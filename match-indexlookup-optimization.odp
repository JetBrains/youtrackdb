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001000008DB0000036996C0243E.png" manifest:media-type="image/png"/>
  <manifest:file-entry manifest:full-path="Pictures/TablePreview1.svm" manifest:media-type=""/>
  <manifest:file-entry manifest:full-path="Pictures/10000001000008DB000003FDA711C38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onsolas" svg:font-family="Consola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1b1b2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cm" fo:padding-bottom="0.1cm" fo:padding-left="0.2cm" fo:padding-right="0.2cm" fo:wrap-option="no-wrap" style:writing-mode="lr-tb" loext:decorative="false"/>
      <style:paragraph-properties style:writing-mode="lr-tb"/>
    </style:style>
    <style:style style:name="gr8" style:family="graphic" style:parent-style-name="standard">
      <style:graphic-properties draw:stroke="solid" svg:stroke-width="0.053cm" svg:stroke-color="#fcb13e" svg:stroke-linecap="butt" draw:fill="solid" draw:fill-color="#252b4a" draw:textarea-horizontal-align="justify" draw:textarea-vertical-align="middle" draw:auto-grow-height="false" draw:fit-to-size="false" style:shrink-to-fit="false" fo:min-height="3.41cm" fo:min-width="4.143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9" style:family="graphic" style:parent-style-name="standard">
      <style:graphic-properties draw:stroke="solid" svg:stroke-width="0.035cm" svg:stroke-color="#fcb13e" svg:stroke-linecap="butt" draw:fill="solid" draw:fill-color="#354266" draw:textarea-horizontal-align="justify" draw:textarea-vertical-align="middle" draw:auto-grow-height="false" draw:fit-to-size="false" style:shrink-to-fit="false" fo:min-height="1.905cm" fo:min-width="3.75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10" style:family="graphic" style:parent-style-name="standard">
      <style:graphic-properties draw:stroke="none" svg:stroke-width="0.026cm" svg:stroke-linecap="butt" draw:fill="solid" draw:fill-color="#9e9e9e" draw:textarea-horizontal-align="justify" draw:textarea-vertical-align="middle" draw:auto-grow-height="false" draw:fit-to-size="false" style:shrink-to-fit="false" fo:min-height="0cm" fo:min-width="0.249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11"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12"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13"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14" style:family="graphic" style:parent-style-name="standard" style:list-style-name="L8">
      <style:graphic-properties draw:stroke="solid" svg:stroke-width="0.035cm" svg:stroke-color="#9ccc65" svg:stroke-linecap="butt" draw:fill="solid" draw:fill-color="#2e5c2e"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15"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16"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17"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18"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19"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0"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1"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2" style:family="graphic" style:parent-style-name="standard" style:list-style-name="L8">
      <style:graphic-properties draw:stroke="solid" svg:stroke-width="0.035cm" svg:stroke-color="#9ccc65" svg:stroke-linecap="butt" draw:fill="solid" draw:fill-color="#2e5c2e"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3"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4"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5"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6"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7"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8"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29"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0"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1" style:family="graphic" style:parent-style-name="standard" style:list-style-name="L8">
      <style:graphic-properties draw:stroke="solid" svg:stroke-width="0.035cm" svg:stroke-color="#9ccc65" svg:stroke-linecap="butt" draw:fill="solid" draw:fill-color="#2e5c2e"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2"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3"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4"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5"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6"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7"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8"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39"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0" style:family="graphic" style:parent-style-name="standard" style:list-style-name="L8">
      <style:graphic-properties draw:stroke="solid" svg:stroke-width="0.035cm" svg:stroke-color="#9ccc65" svg:stroke-linecap="butt" draw:fill="solid" draw:fill-color="#2e5c2e"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1"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2"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3"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4"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5"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6"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7" style:family="graphic" style:parent-style-name="standard" style:list-style-name="L8">
      <style:graphic-properties draw:stroke="solid" svg:stroke-width="0.035cm" svg:stroke-color="#9ccc65" svg:stroke-linecap="butt" draw:fill="solid" draw:fill-color="#2e5c2e"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8"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49"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50"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51" style:family="graphic" style:parent-style-name="standard" style:list-style-name="L7">
      <style:graphic-properties draw:stroke="solid" svg:stroke-width="0.035cm" svg:stroke-color="#e57373" svg:stroke-linecap="butt" draw:fill="solid" draw:fill-color="#663030"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52" style:family="graphic" style:parent-style-name="standard" style:list-style-name="L8">
      <style:graphic-properties draw:stroke="solid" svg:stroke-width="0.035cm" svg:stroke-color="#9ccc65" svg:stroke-linecap="butt" draw:fill="solid" draw:fill-color="#2e5c2e" draw:textarea-horizontal-align="justify" draw:textarea-vertical-align="middle" draw:auto-grow-height="false" draw:fit-to-size="false" style:shrink-to-fit="false" fo:min-height="0.9cm" fo:min-width="0.8cm" fo:padding-top="0.05cm" fo:padding-bottom="0.05cm" fo:padding-left="0.1cm" fo:padding-right="0.1cm" fo:wrap-option="wrap" draw:shadow="visible" draw:shadow-offset-x="0cm" draw:shadow-offset-y="0.064cm" draw:shadow-color="#000000" draw:shadow-opacity="35%" loext:shadow-blur="0.111cm" style:writing-mode="lr-tb" loext:decorative="false"/>
      <style:paragraph-properties style:writing-mode="lr-tb"/>
    </style:style>
    <style:style style:name="gr53" style:family="graphic" style:parent-style-name="standard">
      <style:graphic-properties draw:stroke="solid" svg:stroke-width="0.053cm" svg:stroke-color="#9e9e9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loext:decorative="false"/>
    </style:style>
    <style:style style:name="gr5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9" style:family="graphic" style:parent-style-name="standard">
      <style:graphic-properties draw:stroke="solid" svg:stroke-width="0.053cm" svg:stroke-color="#ff318c" svg:stroke-linecap="butt" draw:fill="solid" draw:fill-color="#252b4a" draw:textarea-horizontal-align="justify" draw:textarea-vertical-align="middle" draw:auto-grow-height="false" draw:fit-to-size="false" style:shrink-to-fit="false" fo:min-height="12.25cm" fo:min-width="14.778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6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andard">
      <style:graphic-properties loext:decorative="false"/>
    </style:style>
    <style:style style:name="gr8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andard" style:list-style-name="L8">
      <style:graphic-properties draw:stroke="solid" svg:stroke-width="0.053cm" svg:stroke-color="#9ccc65" svg:stroke-linecap="butt" draw:fill="solid" draw:fill-color="#354266" draw:textarea-horizontal-align="justify" draw:textarea-vertical-align="middle" draw:auto-grow-height="false" draw:fit-to-size="false" style:shrink-to-fit="false" fo:min-height="2.808cm" fo:min-width="6.042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01" style:family="graphic" style:parent-style-name="standard" style:list-style-name="L12">
      <style:graphic-properties draw:stroke="solid" svg:stroke-width="0.018cm" svg:stroke-color="#90a4ae" svg:stroke-linecap="butt" draw:fill="solid" draw:fill-color="#9ccc65"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02"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03"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04"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05"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06"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07"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08"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09"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0"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1"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2"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3"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4"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5"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6"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7"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8" style:family="graphic" style:parent-style-name="standard" style:list-style-name="L3">
      <style:graphic-properties draw:stroke="solid" svg:stroke-width="0.018cm" svg:stroke-color="#90a4ae"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1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0" style:family="graphic" style:parent-style-name="standard" style:list-style-name="L9">
      <style:graphic-properties draw:stroke="solid" svg:stroke-width="0.053cm" svg:stroke-color="#fcb13e" svg:stroke-linecap="butt" draw:fill="solid" draw:fill-color="#354266" draw:textarea-horizontal-align="justify" draw:textarea-vertical-align="middle" draw:auto-grow-height="false" draw:fit-to-size="false" style:shrink-to-fit="false" fo:min-height="2.808cm" fo:min-width="6.042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21"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22"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23"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24"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25"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26"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27"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28"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29"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0"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1"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2" style:family="graphic" style:parent-style-name="standard" style:list-style-name="L12">
      <style:graphic-properties draw:stroke="solid" svg:stroke-width="0.018cm" svg:stroke-color="#fcb13e" svg:stroke-linecap="butt" draw:fill="solid" draw:fill-color="#fcb13e"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3" style:family="graphic" style:parent-style-name="standard" style:list-style-name="L8">
      <style:graphic-properties draw:stroke="solid" svg:stroke-width="0.018cm" svg:stroke-color="#9ccc65"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4" style:family="graphic" style:parent-style-name="standard" style:list-style-name="L8">
      <style:graphic-properties draw:stroke="solid" svg:stroke-width="0.018cm" svg:stroke-color="#9ccc65"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5" style:family="graphic" style:parent-style-name="standard" style:list-style-name="L8">
      <style:graphic-properties draw:stroke="solid" svg:stroke-width="0.018cm" svg:stroke-color="#9ccc65"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6" style:family="graphic" style:parent-style-name="standard" style:list-style-name="L8">
      <style:graphic-properties draw:stroke="solid" svg:stroke-width="0.018cm" svg:stroke-color="#9ccc65"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7" style:family="graphic" style:parent-style-name="standard" style:list-style-name="L8">
      <style:graphic-properties draw:stroke="solid" svg:stroke-width="0.018cm" svg:stroke-color="#9ccc65"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8" style:family="graphic" style:parent-style-name="standard" style:list-style-name="L8">
      <style:graphic-properties draw:stroke="solid" svg:stroke-width="0.018cm" svg:stroke-color="#9ccc65"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3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1" style:family="graphic" style:parent-style-name="standard" style:list-style-name="L7">
      <style:graphic-properties draw:stroke="solid" svg:stroke-width="0.053cm" svg:stroke-color="#e57373" svg:stroke-linecap="butt" draw:fill="solid" draw:fill-color="#354266" draw:textarea-horizontal-align="justify" draw:textarea-vertical-align="middle" draw:auto-grow-height="false" draw:fit-to-size="false" style:shrink-to-fit="false" fo:min-height="2.808cm" fo:min-width="6.042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42"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43"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44"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45"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46"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47"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48"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49"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0"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1"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2"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3"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4"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5"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6"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7"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8"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59" style:family="graphic" style:parent-style-name="standard" style:list-style-name="L7">
      <style:graphic-properties draw:stroke="solid" svg:stroke-width="0.018cm" svg:stroke-color="#e57373" svg:stroke-linecap="butt" draw:fill="solid" draw:fill-color="#252b4a" draw:textarea-horizontal-align="justify" draw:textarea-vertical-align="middle" draw:auto-grow-height="false" draw:fit-to-size="false" style:shrink-to-fit="false" fo:min-height="0.856cm" fo:min-width="0.75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6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4"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7" style:family="graphic" style:parent-style-name="standard" style:list-style-name="L3">
      <style:graphic-properties draw:stroke="solid" svg:stroke-width="0.035cm" svg:stroke-color="#ff318c" svg:stroke-linecap="butt" draw:fill="solid" draw:fill-color="#252b4a" draw:textarea-horizontal-align="justify" draw:textarea-vertical-align="middle" draw:auto-grow-height="false" draw:fit-to-size="false" style:shrink-to-fit="false" fo:min-height="0cm" fo:min-width="0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68" style:family="graphic" style:parent-style-name="standard" style:list-style-name="L3">
      <style:graphic-properties draw:stroke="solid" svg:stroke-width="0.035cm" svg:stroke-color="#ff318c" svg:stroke-linecap="butt" draw:fill="solid" draw:fill-color="#252b4a" draw:textarea-horizontal-align="justify" draw:textarea-vertical-align="middle" draw:auto-grow-height="false" draw:fit-to-size="false" style:shrink-to-fit="false" fo:min-height="0cm" fo:min-width="0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69" style:family="graphic" style:parent-style-name="standard" style:list-style-name="L3">
      <style:graphic-properties draw:stroke="solid" svg:stroke-width="0.035cm" svg:stroke-color="#ff318c" svg:stroke-linecap="butt" draw:fill="solid" draw:fill-color="#252b4a" draw:textarea-horizontal-align="justify" draw:textarea-vertical-align="middle" draw:auto-grow-height="false" draw:fit-to-size="false" style:shrink-to-fit="false" fo:min-height="0cm" fo:min-width="0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70" style:family="graphic" style:parent-style-name="standard">
      <style:graphic-properties draw:stroke="none" svg:stroke-width="0.026cm" svg:stroke-linecap="butt" draw:fill="solid" draw:fill-color="#9e9e9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171" style:family="graphic" style:parent-style-name="standard" style:list-style-name="L9">
      <style:graphic-properties draw:stroke="solid" svg:stroke-width="0.035cm" svg:stroke-color="#fcb13e" svg:stroke-linecap="butt" draw:fill="solid" draw:fill-color="#354266" draw:textarea-horizontal-align="justify" draw:textarea-vertical-align="middle" draw:auto-grow-height="false" draw:fit-to-size="false" style:shrink-to-fit="false" fo:min-height="0cm" fo:min-width="0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72" style:family="graphic" style:parent-style-name="standard" style:list-style-name="L8">
      <style:graphic-properties draw:stroke="solid" svg:stroke-width="0.035cm" svg:stroke-color="#9ccc65" svg:stroke-linecap="butt" draw:fill="solid" draw:fill-color="#354266" draw:textarea-horizontal-align="justify" draw:textarea-vertical-align="middle" draw:auto-grow-height="false" draw:fit-to-size="false" style:shrink-to-fit="false" fo:min-height="0cm" fo:min-width="0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73" style:family="graphic" style:parent-style-name="standard" style:list-style-name="L8">
      <style:graphic-properties draw:stroke="solid" svg:stroke-width="0.035cm" svg:stroke-color="#9ccc65" svg:stroke-linecap="butt" draw:fill="solid" draw:fill-color="#354266" draw:textarea-horizontal-align="justify" draw:textarea-vertical-align="middle" draw:auto-grow-height="false" draw:fit-to-size="false" style:shrink-to-fit="false" fo:min-height="0cm" fo:min-width="0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74" style:family="graphic" style:parent-style-name="standard" style:list-style-name="L3">
      <style:graphic-properties draw:stroke="solid" svg:stroke-width="0.053cm" svg:stroke-color="#ff318c" svg:stroke-linecap="butt" draw:fill="solid" draw:fill-color="#252b4a" draw:textarea-horizontal-align="justify" draw:textarea-vertical-align="middle" draw:auto-grow-height="false" draw:fit-to-size="false" style:shrink-to-fit="false" fo:min-height="2.055cm" fo:min-width="4.83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75" style:family="graphic" style:parent-style-name="standard" style:list-style-name="L7">
      <style:graphic-properties draw:stroke="solid" svg:stroke-width="0.035cm" svg:stroke-color="#e57373" svg:stroke-linecap="butt" draw:fill="solid" draw:fill-color="#354266" draw:textarea-horizontal-align="justify" draw:textarea-vertical-align="middle" draw:auto-grow-height="false" draw:fit-to-size="false" style:shrink-to-fit="false" fo:min-height="1.179cm" fo:min-width="5.267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7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7" style:family="graphic" style:parent-style-name="standard" style:list-style-name="L3">
      <style:graphic-properties draw:stroke="solid" svg:stroke-width="0.053cm" svg:stroke-color="#ff318c" svg:stroke-linecap="butt" draw:fill="solid" draw:fill-color="#252b4a" draw:textarea-horizontal-align="justify" draw:textarea-vertical-align="middle" draw:auto-grow-height="false" draw:fit-to-size="false" style:shrink-to-fit="false" fo:min-height="2.055cm" fo:min-width="6.10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78" style:family="graphic" style:parent-style-name="standard" style:list-style-name="L3">
      <style:graphic-properties draw:stroke="solid" svg:stroke-width="0.053cm" svg:stroke-color="#ff318c" svg:stroke-linecap="butt" draw:fill="solid" draw:fill-color="#252b4a" draw:textarea-horizontal-align="justify" draw:textarea-vertical-align="middle" draw:auto-grow-height="false" draw:fit-to-size="false" style:shrink-to-fit="false" fo:min-height="2.055cm" fo:min-width="4.836cm" fo:padding-top="0.1cm" fo:padding-bottom="0.1cm" fo:padding-left="0.15cm" fo:padding-right="0.15cm" fo:wrap-option="wrap" draw:shadow="visible" draw:shadow-offset-x="0cm" draw:shadow-offset-y="0.064cm" draw:shadow-color="#000000" draw:shadow-opacity="35%" loext:shadow-blur="0.111cm" style:writing-mode="lr-tb" loext:decorative="false"/>
      <style:paragraph-properties style:writing-mode="lr-tb"/>
    </style:style>
    <style:style style:name="gr179"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18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1" style:family="graphic" style:parent-style-name="standard">
      <style:graphic-properties draw:fill="none" fo:min-height="0cm" fo:min-width="0cm" style:protect="size" style:writing-mode="lr-tb" loext:decorative="false"/>
      <style:paragraph-properties style:writing-mode="lr-tb"/>
    </style:style>
    <style:style style:name="gr18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4"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5"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0" style:family="graphic" style:parent-style-name="standard" style:list-style-name="L5">
      <style:graphic-properties draw:stroke="solid" svg:stroke-width="0.018cm" svg:stroke-color="#404060" draw:fill="solid" draw:fill-color="#121220"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Blank-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Blank-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Blank-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Blank-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6.388cm" style:use-optimal-column-width="false"/>
    </style:style>
    <style:style style:name="co2" style:family="table-column">
      <style:table-column-properties style:column-width="5.555cm" style:use-optimal-column-width="false"/>
    </style:style>
    <style:style style:name="co3" style:family="table-column">
      <style:table-column-properties style:column-width="3.888cm" style:use-optimal-column-width="false"/>
    </style:style>
    <style:style style:name="co4" style:family="table-column">
      <style:table-column-properties style:column-width="4.722cm" style:use-optimal-column-width="false"/>
    </style:style>
    <style:style style:name="co5" style:family="table-column">
      <style:table-column-properties style:column-width="6.666cm" style:use-optimal-column-width="false"/>
    </style:style>
    <style:style style:name="co6" style:family="table-column">
      <style:table-column-properties style:column-width="12.5cm" style:use-optimal-column-width="false"/>
    </style:style>
    <style:style style:name="co7" style:family="table-column">
      <style:table-column-properties style:column-width="11.666cm" style:use-optimal-column-width="false"/>
    </style:style>
    <style:style style:name="co8" style:family="table-column">
      <style:table-column-properties style:column-width="8.333cm" style:use-optimal-column-width="false"/>
    </style:style>
    <style:style style:name="co9" style:family="table-column">
      <style:table-column-properties style:column-width="3.611cm" style:use-optimal-column-width="false"/>
    </style:style>
    <style:style style:name="co10" style:family="table-column">
      <style:table-column-properties style:column-width="15cm" style:use-optimal-column-width="false"/>
    </style:style>
    <style:style style:name="ro1" style:family="table-row">
      <style:table-row-properties style:row-height="1.597cm" style:use-optimal-row-height="false"/>
    </style:style>
    <style:style style:name="ro2" style:family="table-row">
      <style:table-row-properties style:row-height="1.875cm" style:use-optimal-row-height="false"/>
    </style:style>
    <style:style style:name="ro3" style:family="table-row">
      <style:table-row-properties style:row-height="1.388cm" style:use-optimal-row-height="false"/>
    </style:style>
    <style:style style:name="ce1" style:family="table-cell">
      <loext:graphic-properties draw:fill="solid" draw:fill-color="#401530" draw:textarea-vertical-align="top" fo:padding-top="0.127cm" fo:padding-bottom="0.127cm" fo:padding-left="0.254cm" fo:padding-right="0.254cm"/>
      <style:paragraph-properties fo:border="0.48pt solid #ffffff"/>
    </style:style>
    <style:style style:name="ce2" style:family="table-cell">
      <loext:graphic-properties draw:fill="solid" draw:fill-color="#15152a"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3" style:family="paragraph">
      <style:paragraph-properties fo:margin-left="0.6cm" fo:margin-right="0cm" fo:margin-top="0cm" fo:margin-bottom="0cm" fo:line-height="100%" fo:text-align="start" fo:text-indent="0cm"/>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text-properties fo:font-size="12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solid" draw:fill-color="#121220"/>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8pt" fo:hyphenate="false"/>
    </style:style>
    <style:style style:name="P10" style:family="paragraph">
      <loext:graphic-properties draw:fill="solid" draw:fill-color="#252b4a"/>
      <style:paragraph-properties fo:text-align="center" style:writing-mode="lr-tb" style:font-independent-line-spacing="true"/>
      <style:text-properties fo:font-size="18pt"/>
    </style:style>
    <style:style style:name="P11" style:family="paragraph">
      <loext:graphic-properties draw:fill="solid" draw:fill-color="#354266"/>
      <style:paragraph-properties fo:text-align="center" style:writing-mode="lr-tb" style:font-independent-line-spacing="true"/>
      <style:text-properties fo:font-size="18pt"/>
    </style:style>
    <style:style style:name="P12" style:family="paragraph">
      <loext:graphic-properties draw:fill="solid" draw:fill-color="#9e9e9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3" style:family="paragraph">
      <loext:graphic-properties draw:fill="solid" draw:fill-color="#663030"/>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8pt" fo:hyphenate="false"/>
    </style:style>
    <style:style style:name="P14" style:family="paragraph">
      <loext:graphic-properties draw:fill="solid" draw:fill-color="#2e5c2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8pt" fo:hyphenate="false"/>
    </style:style>
    <style:style style:name="P15" style:family="paragraph">
      <loext:graphic-properties draw:fill="none"/>
      <style:paragraph-properties fo:text-align="start"/>
      <style:text-properties fo:font-size="18pt"/>
    </style:style>
    <style:style style:name="P16"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size="18pt"/>
    </style:style>
    <style:style style:name="P17" style:family="paragraph">
      <loext:graphic-properties draw:fill="none" draw:fill-color="#ffffff"/>
      <style:paragraph-properties fo:margin-left="0cm" fo:margin-right="0cm" fo:margin-top="0cm" fo:margin-bottom="0cm" fo:line-height="100%" fo:text-align="end" fo:text-indent="0cm" style:font-independent-line-spacing="true"/>
      <style:text-properties fo:font-size="12pt" style:font-size-asian="14pt" style:font-size-complex="14pt"/>
    </style:style>
    <style:style style:name="P18" style:family="paragraph">
      <loext:graphic-properties draw:fill="solid" draw:fill-color="#252b4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9" style:family="paragraph">
      <style:paragraph-properties fo:text-align="center"/>
    </style:style>
    <style:style style:name="P20" style:family="paragraph">
      <style:paragraph-properties fo:margin-left="0.6cm" fo:margin-right="0cm" fo:margin-top="0cm" fo:margin-bottom="0cm" fo:line-height="100%" fo:text-align="start" fo:text-indent="0cm"/>
      <style:text-properties fo:font-size="18pt"/>
    </style:style>
    <style:style style:name="P2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22" style:family="paragraph">
      <loext:graphic-properties draw:fill="solid" draw:fill-color="#354266"/>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8pt" fo:hyphenate="false"/>
    </style:style>
    <style:style style:name="P23" style:family="paragraph">
      <loext:graphic-properties draw:fill="solid" draw:fill-color="#9ccc65"/>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8pt" fo:hyphenate="false"/>
    </style:style>
    <style:style style:name="P24" style:family="paragraph">
      <loext:graphic-properties draw:fill="solid" draw:fill-color="#252b4a"/>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8pt" fo:hyphenate="false"/>
    </style:style>
    <style:style style:name="P25" style:family="paragraph">
      <loext:graphic-properties draw:fill="solid" draw:fill-color="#fcb13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8pt" fo:hyphenate="false"/>
    </style:style>
    <style:style style:name="P26" style:family="paragraph">
      <loext:graphic-properties draw:fill="none" draw:fill-color="#ffffff"/>
    </style:style>
    <style:style style:name="P27" style:family="paragraph">
      <loext:graphic-properties draw:fill="none" draw:fill-color="#ffffff"/>
      <style:paragraph-properties fo:margin-left="0.6cm" fo:margin-right="0cm" fo:margin-top="0cm" fo:margin-bottom="0cm" fo:line-height="100%" fo:text-align="start" fo:text-indent="0cm"/>
    </style:style>
    <style:style style:name="T1" style:family="text">
      <style:text-properties fo:font-variant="normal" fo:text-transform="none" fo:color="#ff318c"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style:style>
    <style:style style:name="T2" style:family="text">
      <style:text-properties fo:font-variant="normal" fo:text-transform="none" fo:color="#e8b5c8" loext:opacity="100%" style:text-outline="false" style:text-line-through-style="none" style:text-line-through-type="none" style:text-position="0% 100%" style:font-name="Calibri"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3" style:family="text">
      <style:text-properties fo:font-variant="normal" fo:text-transform="none" fo:color="#e0e0e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318c"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7" style:family="text">
      <style:text-properties fo:font-variant="normal" fo:text-transform="none" fo:color="#e8b5c8" loext:opacity="100%" style:text-outline="false" style:text-line-through-style="none" style:text-line-through-type="none" style:text-position="0% 100%" style:font-name="Calibri"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8" style:family="text">
      <style:text-properties fo:font-variant="normal" fo:text-transform="none" fo:color="#b0e0b0" loext:opacity="100%" style:text-outline="false" style:text-line-through-style="none" style:text-line-through-type="none" style:text-position="0% 100%" style:font-name="Consolas"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9" style:family="text">
      <style:text-properties fo:font-variant="normal" fo:text-transform="none" fo:color="#e0e0e0" loext:opacity="100%" style:text-outline="false" style:text-line-through-style="none" style:text-line-through-type="none" style:text-position="0% 100%" style:font-name="Calibri"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10" style:family="text">
      <style:text-properties fo:font-variant="normal" fo:text-transform="none" fo:color="#e0e0e0" loext:opacity="100%" style:text-outline="false" style:text-line-through-style="none" style:text-line-through-type="none" style:text-position="0% 100%" style:font-name="Calibri"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1" style:family="text">
      <style:text-properties fo:font-variant="normal" fo:text-transform="none" fo:color="#e57373"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2" style:family="text">
      <style:text-properties fo:font-variant="normal" fo:text-transform="none" fo:color="#9ccc65"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3" style:family="text">
      <style:text-properties fo:font-variant="normal" fo:text-transform="none" fo:color="#e0e0e0" loext:opacity="100%" style:text-outline="false" style:text-line-through-style="none" style:text-line-through-type="none" style:text-position="0% 100%" style:font-name="Calibri"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4" style:family="text">
      <style:text-properties fo:font-variant="normal" fo:text-transform="none" fo:color="#fcb13e"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fcb13e"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6" style:family="text">
      <style:text-properties fo:font-variant="normal" fo:text-transform="none" fo:color="#90a4ae"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7" style:family="text">
      <style:text-properties fo:font-variant="normal" fo:text-transform="none" fo:color="#e0e0e0" loext:opacity="100%" style:text-outline="false" style:text-line-through-style="none" style:text-line-through-type="none" style:text-position="0% 100%" style:font-name="Consola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90a4ae" loext:opacity="100%" style:text-outline="false" style:text-line-through-style="none" style:text-line-through-type="none" style:text-position="0% 100%" style:font-name="Consola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 style:family="text">
      <style:text-properties fo:font-variant="normal" fo:text-transform="none" fo:color="#9ccc65" loext:opacity="100%" style:text-outline="false" style:text-line-through-style="none" style:text-line-through-type="none" style:text-position="0% 100%" style:font-name="Consola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0" style:family="text">
      <style:text-properties fo:font-variant="normal" fo:text-transform="none" fo:color="#fcb13e" loext:opacity="100%" style:text-outline="false" style:text-line-through-style="none" style:text-line-through-type="none" style:text-position="0% 100%" style:font-name="Calibri" fo:font-size="19pt" fo:letter-spacing="normal" fo:language="en" fo:country="US" fo:font-style="normal" style:text-underline-style="none" fo:font-weight="bold" fo:background-color="transparent" style:font-size-asian="19pt" style:font-style-asian="normal" style:font-weight-asian="bold" style:font-size-complex="19pt" style:font-style-complex="normal" style:font-weight-complex="bold"/>
    </style:style>
    <style:style style:name="T21" style:family="text">
      <style:text-properties fo:font-variant="normal" fo:text-transform="none" fo:color="#e0e0e0"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2" style:family="text">
      <style:text-properties fo:font-variant="normal" fo:text-transform="none" fo:color="#9ccc65"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23" style:family="text">
      <style:text-properties fo:font-variant="normal" fo:text-transform="none" fo:color="#e57373"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24" style:family="text">
      <style:text-properties fo:font-variant="normal" fo:text-transform="none" fo:color="#e0e0e0" loext:opacity="100%" style:text-outline="false" style:text-line-through-style="none" style:text-line-through-type="none" style:text-position="0% 100%" style:font-name="Calibri"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5" style:family="text">
      <style:text-properties fo:font-variant="normal" fo:text-transform="none" fo:color="#fcb13e" loext:opacity="100%" style:text-outline="false" style:text-line-through-style="none" style:text-line-through-type="none" style:text-position="0% 100%" style:font-name="Calibri" fo:font-size="17pt" fo:letter-spacing="normal" fo:language="en" fo:country="US" fo:font-style="normal" style:text-underline-style="none" fo:font-weight="bold" fo:background-color="transparent" style:font-size-asian="17pt" style:font-style-asian="normal" style:font-weight-asian="bold" style:font-size-complex="17pt" style:font-style-complex="normal" style:font-weight-complex="bold"/>
    </style:style>
    <style:style style:name="T26" style:family="text">
      <style:text-properties fo:font-variant="normal" fo:text-transform="none" fo:color="#e0e0e0" loext:opacity="100%" style:text-outline="false" style:text-line-through-style="none" style:text-line-through-type="none" style:text-position="0% 100%" style:font-name="Calibri" fo:font-size="6pt" fo:letter-spacing="normal" fo:language="en" fo:country="US"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27" style:family="text">
      <style:text-properties fo:font-variant="normal" fo:text-transform="none" fo:color="#b0e0b0" loext:opacity="100%" style:text-outline="false" style:text-line-through-style="none" style:text-line-through-type="none" style:text-position="0% 100%" style:font-name="Consolas"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8" style:family="text">
      <style:text-properties fo:font-variant="normal" fo:text-transform="none" fo:color="#b0e0b0" loext:opacity="100%" style:text-outline="false" style:text-line-through-style="none" style:text-line-through-type="none" style:text-position="0% 100%" style:font-name="Consolas" fo:font-size="13pt" fo:letter-spacing="normal" fo:language="en" fo:country="US" fo:font-style="normal" style:text-underline-style="none" fo:font-weight="normal" fo:background-color="#8d1d75" style:font-size-asian="13pt" style:font-style-asian="normal" style:font-weight-asian="normal" style:font-size-complex="13pt" style:font-style-complex="normal" style:font-weight-complex="normal"/>
    </style:style>
    <style:style style:name="T29" style:family="text">
      <style:text-properties fo:font-variant="normal" fo:text-transform="none" fo:color="#e0e0e0" loext:opacity="100%" style:text-outline="false" style:text-line-through-style="none" style:text-line-through-type="none" style:text-position="0% 100%" style:font-name="Calibri"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T30" style:family="text">
      <style:text-properties fo:font-variant="normal" fo:text-transform="none" fo:color="#fcb13e"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1" style:family="text">
      <style:text-properties fo:font-variant="normal" fo:text-transform="none" fo:color="#b0e0b0" loext:opacity="100%" style:text-outline="false" style:text-line-through-style="none" style:text-line-through-type="none" style:text-position="0% 100%" style:font-name="Consola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2" style:family="text">
      <style:text-properties fo:font-variant="normal" fo:text-transform="none" fo:color="#e0e0e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3" style:family="text">
      <style:text-properties fo:font-variant="normal" fo:text-transform="none" fo:color="#ffa0c8"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4" style:family="text">
      <style:text-properties fo:font-variant="normal" fo:text-transform="none" fo:color="#fcb13e" loext:opacity="100%" style:text-outline="false" style:text-line-through-style="none" style:text-line-through-type="none" style:text-position="0% 100%" style:font-name="Calibri"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35" style:family="text">
      <style:text-properties fo:font-variant="normal" fo:text-transform="none" fo:color="#e0e0e0" loext:opacity="100%" style:text-outline="false" style:text-line-through-style="none" style:text-line-through-type="none" style:text-position="0% 100%" style:font-name="Calibri"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6" style:family="text">
      <style:text-properties fo:font-variant="normal" fo:text-transform="none" fo:color="#b0e0b0" loext:opacity="100%" style:text-outline="false" style:text-line-through-style="none" style:text-line-through-type="none" style:text-position="0% 100%" style:font-name="Consolas" fo:font-size="20pt" fo:letter-spacing="normal" fo:language="en" fo:country="US" fo:font-style="normal" fo:text-shadow="none" style:text-underline-style="none" fo:font-weight="normal" style:letter-kerning="true" fo:background-color="transparent"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0e0b0" loext:opacity="100%" style:text-outline="false" style:text-line-through-style="none" style:text-line-through-type="none" style:text-position="0% 100%" style:font-name="Consolas" fo:font-size="20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38" style:family="text">
      <style:text-properties fo:font-variant="normal" fo:text-transform="none" fo:color="#b0e0b0" loext:opacity="100%" style:text-outline="false" style:text-line-through-style="none" style:text-line-through-type="none" style:text-position="0% 100%" style:font-name="Consolas" fo:font-size="18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9" style:family="text">
      <style:text-properties fo:font-variant="normal" fo:text-transform="none" fo:color="#b0e0b0" loext:opacity="100%" style:text-outline="false" style:text-line-through-style="none" style:text-line-through-type="none" style:text-position="0% 100%" style:font-name="Consola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0" style:family="text">
      <style:text-properties fo:font-variant="normal" fo:text-transform="none" fo:color="#b0e0b0"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1" style:family="text">
      <style:text-properties fo:font-variant="normal" fo:text-transform="none" fo:color="#9ccc65" loext:opacity="100%" style:text-outline="false" style:text-line-through-style="none" style:text-line-through-type="none" style:text-position="0% 100%" style:font-name="Calibri"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42" style:family="text">
      <style:text-properties fo:font-variant="normal" fo:text-transform="none" fo:color="#1b1b2f" loext:opacity="100%" style:text-outline="false" style:text-line-through-style="none" style:text-line-through-type="none" style:text-position="0% 100%" style:font-name="Calibri"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43" style:family="text">
      <style:text-properties fo:font-variant="normal" fo:text-transform="none" fo:color="#e0e0e0"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4" style:family="text">
      <style:text-properties fo:font-variant="normal" fo:text-transform="none" fo:color="#fcb13e" loext:opacity="100%" style:text-outline="false" style:text-line-through-style="none" style:text-line-through-type="none" style:text-position="0% 100%" style:font-name="Calibri"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45" style:family="text">
      <style:text-properties fo:font-variant="normal" fo:text-transform="none" fo:color="#e57373"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6" style:family="text">
      <style:text-properties fo:font-variant="normal" fo:text-transform="none" fo:color="#1b1b2f"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47" style:family="text">
      <style:text-properties fo:font-variant="normal" fo:text-transform="none" fo:color="#9ccc65"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8" style:family="text">
      <style:text-properties fo:font-variant="normal" fo:text-transform="none" fo:color="#e57373"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9" style:family="text">
      <style:text-properties fo:font-variant="normal" fo:text-transform="none" fo:color="#fcb13e"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0" style:family="text">
      <style:text-properties fo:font-variant="normal" fo:text-transform="none" fo:color="#e57373" loext:opacity="100%" style:text-outline="false" style:text-line-through-style="none" style:text-line-through-type="none" style:text-position="0% 100%" style:font-name="Calibri"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51" style:family="text">
      <style:text-properties fo:font-variant="normal" fo:text-transform="none" fo:color="#e0e0e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52" style:family="text">
      <style:text-properties fo:font-variant="normal" fo:text-transform="none" fo:color="#9ccc65"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3" style:family="text">
      <style:text-properties fo:font-variant="normal" fo:text-transform="none" fo:color="#e57373"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4" style:family="text">
      <style:text-properties fo:font-variant="normal" fo:text-transform="none" fo:color="#e0e0e0" loext:opacity="100%" style:text-outline="false" style:text-line-through-style="none" style:text-line-through-type="none" style:text-position="0% 100%" style:font-name="Calibri" fo:font-size="13pt" fo:letter-spacing="normal" fo:language="en" fo:country="US" fo:font-style="normal" style:text-underline-style="none" fo:font-weight="normal" fo:background-color="#a7074b" style:font-size-asian="13pt" style:font-style-asian="normal" style:font-weight-asian="normal" style:font-size-complex="13pt" style:font-style-complex="normal" style:font-weight-complex="normal"/>
    </style:style>
    <style:style style:name="T55" style:family="text">
      <style:text-properties fo:font-variant="normal" fo:text-transform="none" fo:color="#9ccc65"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56" style:family="text">
      <style:text-properties fo:font-variant="normal" fo:text-transform="none" fo:color="#e57373"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57" style:family="text">
      <style:text-properties fo:font-variant="normal" fo:text-transform="none" fo:color="#ff318c" loext:opacity="100%" style:text-outline="false" style:text-line-through-style="none" style:text-line-through-type="none" style:text-position="0% 100%" style:font-name="Calibri"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style:style>
    <text:list-style style:name="L1">
      <text:list-level-style-bullet text:level="1" text:bullet-char="●">
        <style:list-level-properties text:min-label-width="0.6cm"/>
        <style:text-properties fo:font-family="OpenSymbol" fo:color="#ff318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e8b5c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e0e0e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b0e0b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e5737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9ccc6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fcb13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90a4a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1b1b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TextBox 1" draw:style-name="gr1" draw:text-style-name="P2" draw:layer="layout" svg:width="31.241cm" svg:height="1.944cm" svg:x="1.27cm" svg:y="5.842cm">
          <text:p text:style-name="P1"><text:span text:style-name="T1">IndexLookup </text:span><text:span text:style-name="T1">Optimization </text:span><text:span text:style-name="T1">in M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2" draw:layer="layout" svg:width="31.241cm" svg:height="1.182cm" svg:x="1.27cm" svg:y="10.16cm">
          <text:p text:style-name="P1"><text:span text:style-name="T2">Skipping vertices that </text:span><text:span text:style-name="T2">won't match — by asking </text:span><text:span text:style-name="T2">the index fi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 draw:text-style-name="P2" draw:layer="layout" svg:width="31.241cm" svg:height="1.013cm" svg:x="1.27cm" svg:y="13.716cm">
          <text:p text:style-name="P1"><text:span text:style-name="T3">Sandra Adamiec <text:s/>· <text:s/>YouTrack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Welcome. This talk is about a specific optimization in the MATCH execution engine: asking an index whether a vertex would pass a WHERE clause BEFORE paying to load it. The optimization gives us 200–1000% throughput wins on LDBC SNB workloads, but only when we make the right runtime decisions about WHEN to use it. About 60% of this talk is about those decisions — the cost arithmetic, the gates, the bounded-loss contract. By the end you should know exactly when this fires, when it doesn't, and how to read the PROFILE counters to verify it in production.</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2" draw:style-name="dp1" draw:master-page-name="Blank">
        <draw:custom-shape draw:name="TextBox 1" draw:style-name="gr5" draw:text-style-name="P2" draw:layer="layout" svg:width="31.241cm" svg:height="1.437cm" svg:x="1.27cm" svg:y="0.762cm">
          <text:p text:style-name="P1"><text:span text:style-name="T6">What we want to </text:span><text:span text:style-name="T6">skip — concrete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6" draw:text-style-name="P2" draw:layer="layout" svg:width="31.241cm" svg:height="1.013cm" svg:x="1.27cm" svg:y="2.54cm">
          <text:p text:style-name="P1"><text:span text:style-name="T7">IC9 as a graph: red = vertices </text:span><text:span text:style-name="T7">loaded and thrown away by </text:span><text:span text:style-name="T7">WHERE; green = vertices that </text:span><text:span text:style-name="T7">actually p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 draw:text-style-name="P7" draw:layer="layout" svg:width="31.78cm" svg:height="0.752cm" svg:x="1.028cm" svg:y="3.833cm">
          <text:p text:style-name="P1"><text:span text:style-name="T8">MATCH {Person, </text:span><text:span text:style-name="T8">id=:pid}.out('KNOWS')</text:span><text:span text:style-name="T8">{friend}.in('HAS_CREATOR'){post, </text:span><text:span text:style-name="T8">where: creationDate &gt; :sinceDate} </text:span><text:span text:style-name="T8">RETURN p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8" draw:text-style-name="P10" draw:layer="layout" svg:width="4.721cm" svg:height="3.888cm" svg:x="1.524cm" svg:y="8.611cm">
          <text:p text:style-name="P8"><text:span text:style-name="T9">Person</text:span></text:p>
          <text:p text:style-name="P8"><text:span text:style-name="T9"/></text:p>
          <text:p text:style-name="P8"><text:span text:style-name="T9">:pid</text:span></text:p>
          <text:p text:style-name="P9"><text:span text:style-name="T9">(1 verte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5" draw:style-name="gr9" draw:text-style-name="P11" draw:layer="layout" svg:width="4.166cm" svg:height="2.221cm" svg:x="9.444cm" svg:y="5.556cm">
          <text:p text:style-name="P8"><text:span text:style-name="T10">friend_1</text:span></text:p>
          <text:p text:style-name="P8"><text:span text:style-name="T10">link bag</text:span></text:p>
          <text:p text:style-name="P9"><text:span text:style-name="T10">5,000 RID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ight Arrow 6" draw:style-name="gr10" draw:text-style-name="P12" draw:layer="layout" svg:width="0.832cm" svg:height="0.332cm" svg:x="13.611cm" svg:y="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Rectangle 7" draw:style-name="gr11" draw:text-style-name="P13" draw:layer="layout" svg:width="0.999cm" svg:height="0.999cm" svg:x="14.722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13" draw:layer="layout" svg:width="0.999cm" svg:height="0.999cm" svg:x="15.889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3" draw:layer="layout" svg:width="0.999cm" svg:height="0.999cm" svg:x="17.056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4" draw:layer="layout" svg:width="0.999cm" svg:height="0.999cm" svg:x="18.222cm" svg:y="6.167cm">
          <text:p text:style-name="P9"><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3" draw:layer="layout" svg:width="0.999cm" svg:height="0.999cm" svg:x="19.389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6" draw:text-style-name="P13" draw:layer="layout" svg:width="0.999cm" svg:height="0.999cm" svg:x="20.556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7" draw:text-style-name="P13" draw:layer="layout" svg:width="0.999cm" svg:height="0.999cm" svg:x="21.722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3" draw:layer="layout" svg:width="0.999cm" svg:height="0.999cm" svg:x="22.889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9" draw:text-style-name="P13" draw:layer="layout" svg:width="0.999cm" svg:height="0.999cm" svg:x="24.056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3" draw:layer="layout" svg:width="0.999cm" svg:height="0.999cm" svg:x="25.222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1" draw:text-style-name="P13" draw:layer="layout" svg:width="0.999cm" svg:height="0.999cm" svg:x="26.389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2" draw:text-style-name="P14" draw:layer="layout" svg:width="0.999cm" svg:height="0.999cm" svg:x="27.556cm" svg:y="6.167cm">
          <text:p text:style-name="P9"><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13" draw:layer="layout" svg:width="0.999cm" svg:height="0.999cm" svg:x="28.722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13" draw:layer="layout" svg:width="0.999cm" svg:height="0.999cm" svg:x="29.889cm" svg:y="6.167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1" draw:style-name="gr9" draw:text-style-name="P11" draw:layer="layout" svg:width="4.166cm" svg:height="2.221cm" svg:x="9.444cm" svg:y="8.889cm">
          <text:p text:style-name="P8"><text:span text:style-name="T10">frie</text:span><text:span text:style-name="T10">nd_</text:span><text:span text:style-name="T10">2</text:span></text:p>
          <text:p text:style-name="P8"><text:span text:style-name="T10">link </text:span><text:span text:style-name="T10">bag</text:span></text:p>
          <text:p text:style-name="P9"><text:span text:style-name="T10">5,0</text:span><text:span text:style-name="T10">00 </text:span><text:span text:style-name="T10">RID</text:span><text:span text:style-name="T10">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ight Arrow 22" draw:style-name="gr10" draw:text-style-name="P12" draw:layer="layout" svg:width="0.832cm" svg:height="0.332cm" svg:x="13.611cm" svg:y="9.83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Rectangle 23" draw:style-name="gr25" draw:text-style-name="P13" draw:layer="layout" svg:width="0.999cm" svg:height="0.999cm" svg:x="14.722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6" draw:text-style-name="P13" draw:layer="layout" svg:width="0.999cm" svg:height="0.999cm" svg:x="15.889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7" draw:text-style-name="P13" draw:layer="layout" svg:width="0.999cm" svg:height="0.999cm" svg:x="17.056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8" draw:text-style-name="P13" draw:layer="layout" svg:width="0.999cm" svg:height="0.999cm" svg:x="18.222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9" draw:text-style-name="P13" draw:layer="layout" svg:width="0.999cm" svg:height="0.999cm" svg:x="19.389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0" draw:text-style-name="P13" draw:layer="layout" svg:width="0.999cm" svg:height="0.999cm" svg:x="20.556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1" draw:text-style-name="P14" draw:layer="layout" svg:width="0.999cm" svg:height="0.999cm" svg:x="21.722cm" svg:y="9.5cm">
          <text:p text:style-name="P9"><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32" draw:text-style-name="P13" draw:layer="layout" svg:width="0.999cm" svg:height="0.999cm" svg:x="22.889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3" draw:layer="layout" svg:width="0.999cm" svg:height="0.999cm" svg:x="24.056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4" draw:text-style-name="P13" draw:layer="layout" svg:width="0.999cm" svg:height="0.999cm" svg:x="25.222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5" draw:text-style-name="P13" draw:layer="layout" svg:width="0.999cm" svg:height="0.999cm" svg:x="26.389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6" draw:text-style-name="P13" draw:layer="layout" svg:width="0.999cm" svg:height="0.999cm" svg:x="27.556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7" draw:text-style-name="P13" draw:layer="layout" svg:width="0.999cm" svg:height="0.999cm" svg:x="28.722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8" draw:text-style-name="P13" draw:layer="layout" svg:width="0.999cm" svg:height="0.999cm" svg:x="29.889cm" svg:y="9.5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7" draw:style-name="gr9" draw:text-style-name="P11" draw:layer="layout" svg:width="4.166cm" svg:height="2.221cm" svg:x="9.444cm" svg:y="12.222cm">
          <text:p text:style-name="P8"><text:span text:style-name="T10">frie</text:span><text:span text:style-name="T10">nd_</text:span><text:span text:style-name="T10">3</text:span></text:p>
          <text:p text:style-name="P8"><text:span text:style-name="T10">link </text:span><text:span text:style-name="T10">bag</text:span></text:p>
          <text:p text:style-name="P9"><text:span text:style-name="T10">5,0</text:span><text:span text:style-name="T10">00 </text:span><text:span text:style-name="T10">RID</text:span><text:span text:style-name="T10">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ight Arrow 38" draw:style-name="gr10" draw:text-style-name="P12" draw:layer="layout" svg:width="0.832cm" svg:height="0.332cm" svg:x="13.611cm" svg:y="13.1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Rectangle 39" draw:style-name="gr39" draw:text-style-name="P13" draw:layer="layout" svg:width="0.999cm" svg:height="0.999cm" svg:x="14.722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0" draw:text-style-name="P14" draw:layer="layout" svg:width="0.999cm" svg:height="0.999cm" svg:x="15.889cm" svg:y="12.833cm">
          <text:p text:style-name="P9"><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41" draw:text-style-name="P13" draw:layer="layout" svg:width="0.999cm" svg:height="0.999cm" svg:x="17.056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42" draw:text-style-name="P13" draw:layer="layout" svg:width="0.999cm" svg:height="0.999cm" svg:x="18.222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43" draw:text-style-name="P13" draw:layer="layout" svg:width="0.999cm" svg:height="0.999cm" svg:x="19.389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44" draw:text-style-name="P13" draw:layer="layout" svg:width="0.999cm" svg:height="0.999cm" svg:x="20.556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5" draw:text-style-name="P13" draw:layer="layout" svg:width="0.999cm" svg:height="0.999cm" svg:x="21.722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46" draw:text-style-name="P13" draw:layer="layout" svg:width="0.999cm" svg:height="0.999cm" svg:x="22.889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47" draw:text-style-name="P14" draw:layer="layout" svg:width="0.999cm" svg:height="0.999cm" svg:x="24.056cm" svg:y="12.833cm">
          <text:p text:style-name="P9"><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48" draw:text-style-name="P13" draw:layer="layout" svg:width="0.999cm" svg:height="0.999cm" svg:x="25.222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49" draw:text-style-name="P13" draw:layer="layout" svg:width="0.999cm" svg:height="0.999cm" svg:x="26.389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0" draw:text-style-name="P13" draw:layer="layout" svg:width="0.999cm" svg:height="0.999cm" svg:x="27.556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51" draw:text-style-name="P13" draw:layer="layout" svg:width="0.999cm" svg:height="0.999cm" svg:x="28.722cm" svg:y="12.833cm">
          <text:p text:style-name="P9"><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52" draw:text-style-name="P14" draw:layer="layout" svg:width="0.999cm" svg:height="0.999cm" svg:x="29.889cm" svg:y="12.833cm">
          <text:p text:style-name="P9"><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53" draw:style-name="gr53" draw:text-style-name="P15" draw:layer="layout" draw:type="line" svg:x1="6.246cm" svg:y1="10.555cm" svg:x2="9.444cm" svg:y2="6.666cm" svg:d="M6246 10555l3198-3889" svg:viewBox="0 0 3199 3890">
          <text:p/>
        </draw:connector>
        <draw:connector draw:name="Connector 54" draw:style-name="gr53" draw:text-style-name="P15" draw:layer="layout" draw:type="line" svg:x1="6.246cm" svg:y1="10.555cm" svg:x2="9.444cm" svg:y2="10cm" svg:d="M6246 10555l3198-555" svg:viewBox="0 0 3199 556">
          <text:p/>
        </draw:connector>
        <draw:connector draw:name="Connector 55" draw:style-name="gr53" draw:text-style-name="P15" draw:layer="layout" draw:type="line" svg:x1="6.246cm" svg:y1="10.555cm" svg:x2="9.444cm" svg:y2="13.333cm" svg:d="M6246 10555l3198 2778" svg:viewBox="0 0 3199 2779">
          <text:p/>
        </draw:connector>
        <draw:custom-shape draw:name="TextBox 56" draw:style-name="gr54" draw:text-style-name="P2" draw:layer="layout" svg:width="30.555cm" svg:height="0.802cm" svg:x="1.524cm" svg:y="15.278cm">
          <text:p text:style-name="P1"><text:span text:style-name="T13">Legend: <text:s text:c="2"/>✗ red = loaded then rejected by WHERE <text:s text:c="6"/>✓ green = actually matches creationDate &gt; :since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55" draw:text-style-name="P2" draw:layer="layout" svg:width="30.555cm" svg:height="0.844cm" svg:x="1.524cm" svg:y="16.389cm">
          <text:p text:style-name="P1"><text:span text:style-name="T14">Reality: 200 friends × 5,000 posts = 1,000,000 vertex loads; ~0.2% pass 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56" draw:text-style-name="P2" draw:layer="layout" svg:width="30.555cm" svg:height="0.844cm" svg:x="1.524cm" svg:y="17.444cm">
          <text:p text:style-name="P1"><text:span text:style-name="T14">The optimization skips every red b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4" draw:layer="layout" svg:width="12.699cm" svg:height="9.524cm" svg:x="3.175cm" svg:y="1.905cm" draw:page-number="2" presentation:class="page"/>
          <draw:frame draw:name="Notes Placeholder 2" presentation:style-name="pr3" draw:text-style-name="P16" draw:layer="layout" svg:width="15.239cm" svg:height="11.429cm" svg:x="1.905cm" svg:y="12.065cm" presentation:class="notes" presentation:user-transformed="true">
            <draw:text-box>
              <text:p text:style-name="P3"><text:span text:style-name="T4">Visual recap before we describe the fix in pseudocode. The query at the top is the same IC9 we just traced. The graph below shows what executes today.</text:span></text:p>
              <text:p text:style-name="P3"><text:span text:style-name="T4"/></text:p>
              <text:p text:style-name="P3"><text:span text:style-name="T4">One Person on the left. Three friend vertices shown — in reality 200. Each friend has a link bag of 5,000 message RIDs — fourteen boxes per row stand in for that 5,000.</text:span></text:p>
              <text:p text:style-name="P3"><text:span text:style-name="T4"/></text:p>
              <text:p text:style-name="P3"><text:span text:style-name="T4">Red crosses are vertices we LOAD from disk today and then THROW AWAY because their creationDate doesn't match. Green checkmarks are the few vertices that actually pass.</text:span></text:p>
              <text:p text:style-name="P3"><text:span text:style-name="T4"/></text:p>
              <text:p text:style-name="P3"><text:span text:style-name="T4">Across the whole picture: 36 posts shown, 6 green, 30 red. Generalize to reality and you get 200 times 5,000 equals one million loads, of which roughly 2,000 actually pass the WHERE. Every red box is wasted I/O.</text:span></text:p>
              <text:p text:style-name="P3"><text:span text:style-name="T4"/></text:p>
              <text:p text:style-name="P3"><text:span text:style-name="T4">The IndexLookup optimization is, in one sentence: skip every red box. Don't even touch them. Load only the green ones. Next slide shows how.</text:span></text:p>
            </draw:text-box>
          </draw:frame>
          <draw:frame draw:name="Slide Number Placeholder 3" presentation:style-name="pr4" draw:text-style-name="P17"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3" draw:style-name="dp1" draw:master-page-name="Blank">
        <draw:custom-shape draw:name="TextBox 1" draw:style-name="gr57" draw:text-style-name="P2" draw:layer="layout" svg:width="31.241cm" svg:height="1.437cm" svg:x="1.27cm" svg:y="0.762cm">
          <text:p text:style-name="P1"><text:span text:style-name="T6">How edges are stored — the link b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58" draw:text-style-name="P2" draw:layer="layout" svg:width="31.241cm" svg:height="1.013cm" svg:x="1.27cm" svg:y="2.54cm">
          <text:p text:style-name="P1"><text:span text:style-name="T7">Each vertex carries its own adjacency as fields on the rec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9" draw:text-style-name="P18" draw:layer="layout" svg:width="15.277cm" svg:height="12.499cm" svg:x="1.524cm" svg:y="3.8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0" draw:text-style-name="P2" draw:layer="layout" svg:width="14.443cm" svg:height="0.928cm" svg:x="1.941cm" svg:y="4.111cm">
          <text:p text:style-name="P1"><text:span text:style-name="T15">VERTEX <text:s/>#12:5 <text:s/>(class: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1" draw:text-style-name="P2" draw:layer="layout" svg:width="14.443cm" svg:height="0.675cm" svg:x="1.941cm" svg:y="5.333cm">
          <text:p text:style-name="P1"><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2" draw:text-style-name="P2" draw:layer="layout" svg:width="14.443cm" svg:height="0.844cm" svg:x="1.941cm" svg:y="5.778cm">
          <text:p text:style-name="P1"><text:span text:style-name="T17">name: <text:s/></text:span><text:span text:style-name="T18">'A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3" draw:text-style-name="P2" draw:layer="layout" svg:width="14.443cm" svg:height="0.844cm" svg:x="1.941cm" svg:y="7.333cm">
          <text:p text:style-name="P1"><text:span text:style-name="T17">birthDay: <text:s/></text:span><text:span text:style-name="T18">1989-0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4" draw:text-style-name="P2" draw:layer="layout" svg:width="14.443cm" svg:height="1.437cm" svg:x="1.941cm" svg:y="10.444cm">
          <text:p text:style-name="P1"><text:span text:style-name="T17">out_KNOWS: <text:s/></text:span><text:span text:style-name="T19">LinkBag[#12:9, #12:14, …] <text:s/>(200 R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5" draw:text-style-name="P2" draw:layer="layout" svg:width="14.443cm" svg:height="1.437cm" svg:x="1.941cm" svg:y="12cm">
          <text:p text:style-name="P1"><text:span text:style-name="T17">in_HAS_CREATOR: <text:s/></text:span><text:span text:style-name="T19">LinkBag[#13:0, #13:7, …] <text:s/>(5 000 R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6" draw:text-style-name="P2" draw:layer="layout" svg:width="14.443cm" svg:height="1.437cm" svg:x="1.941cm" svg:y="13.556cm">
          <text:p text:style-name="P1"><text:span text:style-name="T17">out_LOCATED_IN: <text:s/></text:span><text:span text:style-name="T19">LinkBag[#15:2] <text:s text:c="15"/>(1 R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7" draw:text-style-name="P2" draw:layer="layout" svg:width="15.416cm" svg:height="1.055cm" svg:x="17.5cm" svg:y="3.833cm">
          <text:p text:style-name="P1"><text:span text:style-name="T20">Edge fields = built-in adjacency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8" draw:text-style-name="P2" draw:layer="layout" svg:width="15.416cm" svg:height="9.183cm" svg:x="17.5cm" svg:y="5.361cm">
          <text:p text:style-name="P1"><text:span text:style-name="T21">• </text:span><text:span text:style-name="T21">Every vertex stores its own neighbors as </text:span><text:span text:style-name="T8">out_&lt;EdgeClass&gt;</text:span><text:span text:style-name="T21"> and </text:span><text:span text:style-name="T8">in_&lt;EdgeClass&gt;</text:span><text:span text:style-name="T21"> fields</text:span></text:p>
          <text:p text:style-name="P1"><text:span text:style-name="T21">• </text:span><text:span text:style-name="T21">Each is a </text:span><text:span text:style-name="T8">LinkBag</text:span><text:span text:style-name="T21"> — a list of RIDs of the neighbor records</text:span></text:p>
          <text:p text:style-name="P1"><text:span text:style-name="T21">• </text:span><text:span text:style-name="T21">Walking the LinkBag is </text:span><text:span text:style-name="T22">cheap</text:span><text:span text:style-name="T21"> — sequential RIDs, O(bag size)</text:span></text:p>
          <text:p text:style-name="P1"><text:span text:style-name="T21">• </text:span><text:span text:style-name="T21">Loading each RID is </text:span><text:span text:style-name="T23">expensive</text:span><text:span text:style-name="T21"> — random disk I/O per neighbor record</text:span></text:p>
          <text:p text:style-name="P1"><text:span text:style-name="T24"/></text:p>
          <text:p text:style-name="P1"><text:span text:style-name="T25">The pre-filter shortcuts the load step:</text:span></text:p>
          <text:p text:style-name="P1"><text:span text:style-name="T21">• </text:span><text:span text:style-name="T21">Build a fast lookup </text:span><text:span text:style-name="T8">RidSet</text:span><text:span text:style-name="T21"> of every RID that would pass WHERE</text:span></text:p>
          <text:p text:style-name="P1"><text:span text:style-name="T21">• </text:span><text:span text:style-name="T21">While walking the LinkBag, probe the RidSet first</text:span></text:p>
          <text:p text:style-name="P1"><text:span text:style-name="T21">• </text:span><text:span text:style-name="T21">Only load RIDs that pass the probe — ~99% rejection happens at memory speed</text:span></text:p>
          <text:p text:style-name="P1"><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4" draw:layer="layout" svg:width="12.699cm" svg:height="9.524cm" svg:x="3.175cm" svg:y="1.905cm" draw:page-number="3" presentation:class="page"/>
          <draw:frame draw:name="Notes Placeholder 2" presentation:style-name="pr5" draw:text-style-name="P16" draw:layer="layout" svg:width="15.239cm" svg:height="11.429cm" svg:x="1.905cm" svg:y="12.065cm" presentation:class="notes" presentation:user-transformed="true">
            <draw:text-box>
              <text:p text:style-name="P3"><text:span text:style-name="T4">One more piece of background. In YouTrackDB, edges aren't separate records — each vertex carries its own adjacency as fields on its own record. A Person record has out_KNOWS pointing to a list of friend RIDs, in_HAS_CREATOR pointing to message RIDs. The LinkBag is just that list. Walking the list is cheap — it's sequential RIDs already in memory once the vertex is loaded. Loading each RID is the expensive part — random disk I/O per neighbor record. That asymmetry is the entire economic premise of this optimization. We trade one cheap operation, a bitmap probe, for many expensive operations, vertex loads we won't use.</text:span></text:p>
            </draw:text-box>
          </draw:frame>
          <draw:frame draw:name="Slide Number Placeholder 3" presentation:style-name="pr6" draw:text-style-name="P17"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4" draw:style-name="dp1" draw:master-page-name="Blank">
        <draw:frame draw:style-name="gr69" draw:text-style-name="P19" draw:layer="layout" svg:width="33.865cm" svg:height="15.251cm" svg:x="0.1cm" svg:y="1.958cm">
          <draw:image xlink:href="Pictures/10000001000008DB000003FDA711C38A.png" xlink:type="simple" xlink:show="embed" xlink:actuate="onLoad" draw:mime-type="image/png">
            <text:p/>
          </draw:image>
        </draw:frame>
        <presentation:notes draw:style-name="dp4">
          <draw:page-thumbnail draw:name="Slide Image Placeholder 3" draw:style-name="gr4" draw:layer="layout" svg:width="12.699cm" svg:height="9.524cm" svg:x="3.175cm" svg:y="1.905cm" draw:page-number="4" presentation:class="page"/>
          <draw:frame draw:name="Notes Placeholder 4" presentation:style-name="pr1" draw:text-style-name="P4" draw:layer="layout" svg:width="15.239cm" svg:height="11.429cm" svg:x="1.905cm" svg:y="12.065cm" presentation:class="notes" presentation:user-transformed="true">
            <draw:text-box>
              <text:p text:style-name="P3"><text:span text:style-name="T4">Concrete example. LDBC SNB IC9 — friend-of-friend recent messages. Today's execution: 200 friends, each has roughly 5000 messages in their HAS_CREATOR link bag, we want only messages created after a specific date. We load all million messages, just to check their creationDate field. 99.8 percent of those loads are wasted — the WHERE clause rejects them. The crucial detail: the WHERE only checks creationDate. We have an index on Message.creationDate. We could resolve the answer from the index without ever loading those messages. That's the structural opportunity this optimization captures.</text:span></text:p>
            </draw:text-box>
          </draw:frame>
          <draw:frame draw:name="Slide Number Placeholder 4"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5" draw:style-name="dp1" draw:master-page-name="Blank">
        <draw:custom-shape draw:name="TextBox 13" draw:style-name="gr70" draw:text-style-name="P2" draw:layer="layout" svg:width="31.241cm" svg:height="1.437cm" svg:x="1.27cm" svg:y="0.762cm">
          <text:p text:style-name="P1"><text:span text:style-name="T6">The idea — ask the index once, intersect for 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19" draw:layer="layout" svg:width="33.865cm" svg:height="13.04cm" svg:x="0.1cm" svg:y="3.063cm">
          <draw:image xlink:href="Pictures/10000001000008DB0000036996C0243E.png" xlink:type="simple" xlink:show="embed" xlink:actuate="onLoad" draw:mime-type="image/png">
            <text:p/>
          </draw:image>
        </draw:frame>
        <presentation:notes draw:style-name="dp4">
          <draw:page-thumbnail draw:name="Slide Image Placeholder 2" draw:style-name="gr4" draw:layer="layout" svg:width="12.699cm" svg:height="9.524cm" svg:x="3.175cm" svg:y="1.905cm" draw:page-number="5" presentation:class="page"/>
          <draw:frame draw:name="Notes Placeholder 3" presentation:style-name="pr1" draw:text-style-name="P16" draw:layer="layout" svg:width="15.239cm" svg:height="11.429cm" svg:x="1.905cm" svg:y="12.065cm" presentation:class="notes" presentation:user-transformed="true">
            <draw:text-box>
              <text:p text:style-name="P20"><text:span text:style-name="T4">The fix in pseudocode. Once, before the friend loop: scan the creationDate index for the date range, get back roughly 14,000 qualifying message RIDs, materialize them into a fast bitmap we call a RidSet. Then per friend: walk the 5000-RID link bag as before, but for each RID probe the bitmap first. Only RIDs that pass the probe reach loadEntity. The index scan is paid ONCE for the entire query. The bitmap probe is O(1) memory access. The orders-of-magnitude cost gap between "probe" and "load" is what makes this profitable.</text:span></text:p>
            </draw:text-box>
          </draw:frame>
          <draw:frame draw:name="Slide Number Placeholder 2" presentation:style-name="pr2" draw:text-style-name="P17"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6" draw:style-name="dp1" draw:master-page-name="Blank">
        <draw:custom-shape draw:name="TextBox 2" draw:style-name="gr71" draw:text-style-name="P2" draw:layer="layout" svg:width="31.241cm" svg:height="1.013cm" svg:x="1.292cm" svg:y="0.65cm">
          <text:p text:style-name="P1"><text:span text:style-name="T7">Concrete example: friends recent mess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2" draw:text-style-name="P7" draw:layer="layout" svg:width="30.818cm" svg:height="2.156cm" svg:x="1.524cm" svg:y="1.705cm">
          <text:p text:style-name="P1"><text:span text:style-name="T27">MATCH {class: Person, where: id </text:span><text:span text:style-name="T27">= :pid}.out('KNOWS'){as: friend}</text:span></text:p>
          <text:p text:style-name="P1"><text:span text:style-name="T27"><text:s text:c="6"/></text:span><text:span text:style-name="T27">.in('HAS_CREATOR'){as: msg, where: </text:span><text:span text:style-name="T27">creationDate &gt; :sinceDate}</text:span></text:p>
          <text:p text:style-name="P1"><text:span text:style-name="T27">RETURN ms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73" draw:text-style-name="P2" draw:layer="layout" svg:width="30.818cm" svg:height="0.971cm" svg:x="1.367cm" svg:y="4.244cm">
          <text:p text:style-name="P1"><text:span text:style-name="T25">Per-friend execution pre-opti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4" draw:text-style-name="P7" draw:layer="layout" svg:width="30.818cm" svg:height="3.557cm" svg:x="1.567cm" svg:y="5.268cm">
          <text:p text:style-name="P1"><text:span text:style-name="T8">for friend in person.out('KNOWS'): <text:s text:c="19"/>// ~200 friends</text:span></text:p>
          <text:p text:style-name="P1"><text:span text:style-name="T8"><text:s text:c="4"/></text:span><text:span text:style-name="T8">bag = friend.in_HAS_CREATOR <text:s text:c="22"/>// ~5 000 message RIDs</text:span></text:p>
          <text:p text:style-name="P1"><text:span text:style-name="T8"><text:s text:c="4"/></text:span><text:span text:style-name="T8">for rid in bag:</text:span></text:p>
          <text:p text:style-name="P1"><text:span text:style-name="T8"><text:s text:c="8"/></text:span><text:span text:style-name="T28">msg = loadEntity(rid)</text:span><text:span text:style-name="T8"> <text:s text:c="25"/>// ← random I/O</text:span></text:p>
          <text:p text:style-name="P1"><text:span text:style-name="T8"><text:s text:c="8"/></text:span><text:span text:style-name="T28">if msg.creationDate &gt; :sinceDate:</text:span><text:span text:style-name="T8"> <text:s text:c="13"/>// ~10 of 5 000 match</text:span></text:p>
          <text:p text:style-name="P1"><text:span text:style-name="T8"><text:s text:c="12"/></text:span><text:span text:style-name="T8">yield ms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5" draw:text-style-name="P7" draw:layer="layout" svg:width="30.818cm" svg:height="5.761cm" svg:x="1.57cm" svg:y="12.7cm">
          <text:p text:style-name="P1"><text:span text:style-name="T8">// </text:span><text:span text:style-name="T8">onc</text:span><text:span text:style-name="T8">e, </text:span><text:span text:style-name="T8">bef</text:span><text:span text:style-name="T8">ore </text:span><text:span text:style-name="T8">the </text:span><text:span text:style-name="T8">fri</text:span><text:span text:style-name="T8">end </text:span><text:span text:style-name="T8">loo</text:span><text:span text:style-name="T8">p:</text:span></text:p>
          <text:p text:style-name="P1"><text:span text:style-name="T8">qua</text:span><text:span text:style-name="T8">lif</text:span><text:span text:style-name="T8">yin</text:span><text:span text:style-name="T8">gRi</text:span><text:span text:style-name="T8">ds </text:span><text:span text:style-name="T8">= </text:span><text:span text:style-name="T8">cre</text:span><text:span text:style-name="T8">ati</text:span><text:span text:style-name="T8">onD</text:span><text:span text:style-name="T8">ate</text:span><text:span text:style-name="T8">Ind</text:span><text:span text:style-name="T8">ex.</text:span><text:span text:style-name="T8">sca</text:span><text:span text:style-name="T8">n(&gt; </text:span><text:span text:style-name="T8">:si</text:span><text:span text:style-name="T8">nce</text:span><text:span text:style-name="T8">Dat</text:span><text:span text:style-name="T8">e) <text:s/></text:span><text:span text:style-name="T8"><text:s/>// </text:span><text:span text:style-name="T8">14 </text:span><text:span text:style-name="T8">000 </text:span><text:span text:style-name="T8">RID</text:span><text:span text:style-name="T8">s</text:span></text:p>
          <text:p text:style-name="P1"><text:span text:style-name="T8">rid</text:span><text:span text:style-name="T8">Set </text:span><text:span text:style-name="T8"><text:s text:c="4"/></text:span><text:span text:style-name="T8"><text:s text:c="4"/></text:span><text:span text:style-name="T8">= </text:span><text:span text:style-name="T8">new </text:span><text:span text:style-name="T8">Rid</text:span><text:span text:style-name="T8">Set</text:span><text:span text:style-name="T8">(qu</text:span><text:span text:style-name="T8">ali</text:span><text:span text:style-name="T8">fyi</text:span><text:span text:style-name="T8">ngR</text:span><text:span text:style-name="T8">ids</text:span><text:span text:style-name="T8">) <text:s text:c="2"/></text:span><text:span text:style-name="T8"><text:s text:c="4"/></text:span><text:span text:style-name="T8"><text:s text:c="4"/></text:span><text:span text:style-name="T8"><text:s text:c="2"/>/</text:span><text:span text:style-name="T8">/ </text:span><text:span text:style-name="T8">fas</text:span><text:span text:style-name="T8">t </text:span><text:span text:style-name="T8">loo</text:span><text:span text:style-name="T8">kup </text:span><text:span text:style-name="T8">bit</text:span><text:span text:style-name="T8">map</text:span></text:p>
          <text:p text:style-name="P1"><text:span text:style-name="T8"/></text:p>
          <text:p text:style-name="P1"><text:span text:style-name="T8">// </text:span><text:span text:style-name="T8">per </text:span><text:span text:style-name="T8">fri</text:span><text:span text:style-name="T8">end</text:span><text:span text:style-name="T8">:</text:span></text:p>
          <text:p text:style-name="P1"><text:span text:style-name="T8">for </text:span><text:span text:style-name="T8">fri</text:span><text:span text:style-name="T8">end </text:span><text:span text:style-name="T8">in </text:span><text:span text:style-name="T8">per</text:span><text:span text:style-name="T8">son</text:span><text:span text:style-name="T8">.ou</text:span><text:span text:style-name="T8">t('</text:span><text:span text:style-name="T8">KNO</text:span><text:span text:style-name="T8">WS'</text:span><text:span text:style-name="T8">):</text:span></text:p>
          <text:p text:style-name="P1"><text:span text:style-name="T8"><text:s text:c="4"/></text:span><text:span text:style-name="T8">bag </text:span><text:span text:style-name="T8">= </text:span><text:span text:style-name="T8">fri</text:span><text:span text:style-name="T8">end</text:span><text:span text:style-name="T8">.in</text:span><text:span text:style-name="T8">_HA</text:span><text:span text:style-name="T8">S_C</text:span><text:span text:style-name="T8">REA</text:span><text:span text:style-name="T8">TOR </text:span><text:span text:style-name="T8"><text:s text:c="4"/></text:span><text:span text:style-name="T8"><text:s text:c="4"/></text:span><text:span text:style-name="T8"><text:s text:c="4"/></text:span><text:span text:style-name="T8"><text:s text:c="4"/></text:span><text:span text:style-name="T8"><text:s text:c="4"/></text:span><text:span text:style-name="T8"><text:s text:c="4"/></text:span><text:span text:style-name="T8"><text:s/>// </text:span><text:span text:style-name="T8">5 </text:span><text:span text:style-name="T8">000 </text:span><text:span text:style-name="T8">RID</text:span><text:span text:style-name="T8">s</text:span></text:p>
          <text:p text:style-name="P1"><text:span text:style-name="T8"><text:s text:c="4"/></text:span><text:span text:style-name="T8">for </text:span><text:span text:style-name="T8">rid </text:span><text:span text:style-name="T8">in </text:span><text:span text:style-name="T8">bag</text:span><text:span text:style-name="T8">:</text:span></text:p>
          <text:p text:style-name="P1"><text:span text:style-name="T8"><text:s text:c="4"/></text:span><text:span text:style-name="T8"><text:s text:c="4"/></text:span><text:span text:style-name="T28">if </text:span><text:span text:style-name="T28">rid</text:span><text:span text:style-name="T28">Set</text:span><text:span text:style-name="T28">.co</text:span><text:span text:style-name="T28">nta</text:span><text:span text:style-name="T28">ins</text:span><text:span text:style-name="T28">(ri</text:span><text:span text:style-name="T28">d): </text:span><text:span text:style-name="T8"><text:s text:c="4"/></text:span><text:span text:style-name="T8"><text:s text:c="4"/></text:span><text:span text:style-name="T8"><text:s text:c="4"/></text:span><text:span text:style-name="T8"><text:s text:c="4"/></text:span><text:span text:style-name="T8"><text:s text:c="4"/></text:span><text:span text:style-name="T8"><text:s text:c="4"/></text:span><text:span text:style-name="T8">// </text:span><text:span text:style-name="T8">O(1</text:span><text:span text:style-name="T8">), </text:span><text:span text:style-name="T8">no </text:span><text:span text:style-name="T8">I/O</text:span></text:p>
          <text:p text:style-name="P1"><text:span text:style-name="T8"><text:s text:c="4"/></text:span><text:span text:style-name="T8"><text:s text:c="4"/></text:span><text:span text:style-name="T8"><text:s text:c="4"/></text:span><text:span text:style-name="T8">yie</text:span><text:span text:style-name="T8">ld </text:span><text:span text:style-name="T8">loa</text:span><text:span text:style-name="T8">dEn</text:span><text:span text:style-name="T8">tit</text:span><text:span text:style-name="T8">y(r</text:span><text:span text:style-name="T8">id) </text:span><text:span text:style-name="T8"><text:s text:c="4"/></text:span><text:span text:style-name="T8"><text:s text:c="4"/></text:span><text:span text:style-name="T8"><text:s text:c="4"/></text:span><text:span text:style-name="T8"><text:s text:c="4"/></text:span><text:span text:style-name="T8"><text:s text:c="4"/></text:span><text:span text:style-name="T8"><text:s text:c="3"/></text:span><text:span text:style-name="T8">// </text:span><text:span text:style-name="T8">onl</text:span><text:span text:style-name="T8">y </text:span><text:span text:style-name="T8">~10 </text:span><text:span text:style-name="T8">sur</text:span><text:span text:style-name="T8">viv</text:span><text:span text:style-name="T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6" draw:text-style-name="P2" draw:layer="layout" svg:width="30.818cm" svg:height="0.971cm" svg:x="1.37cm" svg:y="11.63cm">
          <text:p text:style-name="P1"><text:span text:style-name="T25">Pe</text:span><text:span text:style-name="T25">r-</text:span><text:span text:style-name="T25">fri</text:span><text:span text:style-name="T25">en</text:span><text:span text:style-name="T25">d </text:span><text:span text:style-name="T25">ex</text:span><text:span text:style-name="T25">ec</text:span><text:span text:style-name="T25">ut</text:span><text:span text:style-name="T25">io</text:span><text:span text:style-name="T25">n </text:span><text:span text:style-name="T25">po</text:span><text:span text:style-name="T25">st-</text:span><text:span text:style-name="T25">op</text:span><text:span text:style-name="T25">ti</text:span><text:span text:style-name="T25">mi</text:span><text:span text:style-name="T25">za</text:span><text:span text:style-name="T25">ti</text:span><text:span text:style-name="T25">on</text:span><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77" draw:text-style-name="P2" draw:layer="layout" svg:width="30.818cm" svg:height="1.691cm" svg:x="1.467cm" svg:y="9.36cm">
          <text:p text:style-name="P1"><text:span text:style-name="T29">Cl</text:span><text:span text:style-name="T29">as</text:span><text:span text:style-name="T29">s </text:span><text:span text:style-name="T25">M</text:span><text:span text:style-name="T25">es</text:span><text:span text:style-name="T25">sa</text:span><text:span text:style-name="T25">ge</text:span><text:span text:style-name="T29"> </text:span><text:span text:style-name="T29">ha</text:span><text:span text:style-name="T29">s </text:span><text:span text:style-name="T29">an </text:span><text:span text:style-name="T29">in</text:span><text:span text:style-name="T29">de</text:span><text:span text:style-name="T29">x </text:span><text:span text:style-name="T29">on </text:span><text:span text:style-name="T27">cr</text:span><text:span text:style-name="T27">ea</text:span><text:span text:style-name="T27">ti</text:span><text:span text:style-name="T27">on</text:span><text:span text:style-name="T27">Da</text:span><text:span text:style-name="T27">te</text:span><text:span text:style-name="T29">. </text:span><text:span text:style-name="T29">O</text:span><text:span text:style-name="T29">ne </text:span><text:span text:style-name="T29">sc</text:span><text:span text:style-name="T29">an </text:span><text:span text:style-name="T29">of </text:span><text:span text:style-name="T29">th</text:span><text:span text:style-name="T29">e </text:span><text:span text:style-name="T29">in</text:span><text:span text:style-name="T29">de</text:span><text:span text:style-name="T29">x </text:span><text:span text:style-name="T29">gi</text:span><text:span text:style-name="T29">ve</text:span><text:span text:style-name="T29">s </text:span><text:span text:style-name="T29">ev</text:span><text:span text:style-name="T29">er</text:span><text:span text:style-name="T29">y </text:span><text:span text:style-name="T29">qu</text:span><text:span text:style-name="T29">ali</text:span><text:span text:style-name="T29">fyi</text:span><text:span text:style-name="T29">ng </text:span><text:span text:style-name="T29">RI</text:span><text:span text:style-name="T29">D </text:span><text:span text:style-name="T29">— </text:span><text:span text:style-name="T29">fo</text:span><text:span text:style-name="T29">r </text:span><text:span text:style-name="T29">th</text:span><text:span text:style-name="T29">e </text:span><text:span text:style-name="T29">w</text:span><text:span text:style-name="T29">ho</text:span><text:span text:style-name="T29">le </text:span><text:span text:style-name="T29">qu</text:span><text:span text:style-name="T29">er</text:span><text:span text:style-name="T29">y, </text:span><text:span text:style-name="T29">on</text:span><text:span text:style-name="T29">ce</text:span><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4" draw:layer="layout" svg:width="12.699cm" svg:height="9.524cm" svg:x="3.175cm" svg:y="1.905cm" draw:page-number="6" presentation:class="page"/>
          <draw:frame draw:name="Notes Placeholder 2" presentation:style-name="pr1" draw:text-style-name="P16" draw:layer="layout" svg:width="15.239cm" svg:height="11.429cm" svg:x="1.905cm" svg:y="12.065cm" presentation:class="notes" presentation:user-transformed="true">
            <draw:text-box>
              <text:p text:style-name="P20"><text:span text:style-name="T4">Concrete example. LDBC SNB IC9 — friend-of-friend recent messages. Today's execution: 200 friends, each has roughly 5000 messages in their HAS_CREATOR link bag, we want only messages created after a specific date. We load all million messages, just to check their creationDate field. 99.8 percent of those loads are wasted — the WHERE clause rejects them. The crucial detail: the WHERE only checks creationDate. We have an index on Message.creationDate. We could resolve the answer from the index without ever loading those messages. That's the structural opportunity this optimization captures.</text:span></text:p>
            </draw:text-box>
          </draw:frame>
          <draw:frame draw:name="Slide Number Placeholder 3" presentation:style-name="pr2" draw:text-style-name="P17"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7" draw:style-name="dp1" draw:master-page-name="Blank">
        <draw:custom-shape draw:name="TextBox 1" draw:style-name="gr78" draw:text-style-name="P2" draw:layer="layout" svg:width="31.241cm" svg:height="1.437cm" svg:x="1.27cm" svg:y="0.762cm">
          <text:p text:style-name="P1"><text:span text:style-name="T6">Which queries benef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79" draw:text-style-name="P2" draw:layer="layout" svg:width="31.241cm" svg:height="1.013cm" svg:x="1.27cm" svg:y="2.54cm">
          <text:p text:style-name="P1"><text:span text:style-name="T7">MATCH target nodes whose WHERE matches an index on the target 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0" draw:text-style-name="P2" draw:layer="layout" svg:width="30.818cm" svg:height="1.013cm" svg:x="1.524cm" svg:y="4.694cm">
          <text:p text:style-name="P1"><text:span text:style-name="T30">Query shapes the planner recogn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1" draw:text-style-name="P7" draw:layer="layout" svg:width="30.818cm" svg:height="2.623cm" svg:x="1.524cm" svg:y="6.039cm">
          <text:p text:style-name="P1"><text:span text:style-name="T31">{as: msg, <text:s text:c="5"/>where: (creationDate &gt;= :start AND creationDate &lt; :end)}</text:span></text:p>
          <text:p text:style-name="P1"><text:span text:style-name="T31">{as: country, <text:s/>where: (name IN [:cX, :cY])}</text:span></text:p>
          <text:p text:style-name="P1"><text:span text:style-name="T31">{as: post, <text:s text:c="4"/>where: (length BETWEEN 100 AND 500)} <text:s text:c="4"/>// rewritten to &gt;= AND &lt;=</text:span></text:p>
          <text:p text:style-name="P1"><text:span text:style-name="T31">{as: forum, <text:s text:c="3"/>where: (title = :title)} <text:s text:c="16"/>// unique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82" draw:text-style-name="P2" draw:layer="layout" svg:width="30.818cm" svg:height="3.296cm" svg:x="1.524cm" svg:y="9.722cm">
          <text:p text:style-name="P1"><text:span text:style-name="T30">Three requirements</text:span></text:p>
          <text:p text:style-name="P1"><text:span text:style-name="T32">1. Target node has a WHERE clause</text:span></text:p>
          <text:p text:style-name="P1"><text:span text:style-name="T32">2. The class has an index covering that condition (range, hash, unique, etc.)</text:span></text:p>
          <text:p text:style-name="P1"><text:span text:style-name="T32">3. The condition does </text:span><text:span text:style-name="T15">not reference $matched</text:span><text:span text:style-name="T32"> — index parameters must be resolvable when the query starts</text:span></text:p>
          <text:p text:style-name="P1"><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7"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When does the planner attach an IndexLookup descriptor? Three requirements. One: target node has a WHERE clause. Two: the target class has an index covering that condition — range, hash, unique, full-text whatever. Three: the condition does NOT reference $matched. Index parameters must be resolvable at query start, not mid-traversal — otherwise the result isn't constant per query and we lose the amortization. Common shapes are date ranges, IN lists, BETWEEN (which we rewrite), and exact-match on unique indexes. On LDBC: IC3, IC9, IS7 hit this pattern. Any production query whose target node filters on indexed properties is a candidate. Note: filters that reference $matched — like "where my friend's friend is in this list" — need different techniques. This optimization is specifically for class-level predicates.</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8" draw:style-name="dp1" draw:master-page-name="Blank">
        <draw:custom-shape draw:name="TextBox 1" draw:style-name="gr83" draw:text-style-name="P2" draw:layer="layout" svg:width="31.241cm" svg:height="1.437cm" svg:x="1.27cm" svg:y="0.762cm">
          <text:p text:style-name="P1"><text:span text:style-name="T6">The catch — the index scan itself costs some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4" draw:text-style-name="P2" draw:layer="layout" svg:width="31.241cm" svg:height="1.013cm" svg:x="1.27cm" svg:y="2.54cm">
          <text:p text:style-name="P1"><text:span text:style-name="T7">If the source is small, the scan can cost more than the sav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5" draw:text-style-name="P2" draw:layer="layout" svg:width="30.818cm" svg:height="1.691cm" svg:x="1.524cm" svg:y="3.694cm">
          <text:p text:style-name="P1"><text:span text:style-name="T29">Index scan produces 14 000 RIDs. <text:s/>Cost ≈ 14 000 I/O reads </text:span><text:span text:style-name="T25">once</text:span><text:span text:style-name="T29"> — that's the </text:span><text:span text:style-name="T25">build cost (denoted B from here on)</text:span><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86" draw:layer="layout" svg:width="30.829cm" svg:height="6.387cm" svg:x="1.524cm" svg:y="5.556cm">
          <table:table>
            <table:table-column table:style-name="co1"/>
            <table:table-column table:style-name="co2"/>
            <table:table-column table:style-name="co3"/>
            <table:table-column table:style-name="co2"/>
            <table:table-column table:style-name="co4"/>
            <table:table-column table:style-name="co4"/>
            <table:table-row table:style-name="ro1" table:default-cell-style-name="ce1">
              <table:table-cell>
                <text:p text:style-name="P21"><text:span text:style-name="T33">Scenario</text:span></text:p>
              </table:table-cell>
              <table:table-cell>
                <text:p text:style-name="P21"><text:span text:style-name="T33">Traversal volume (n)</text:span></text:p>
              </table:table-cell>
              <table:table-cell>
                <text:p text:style-name="P21"><text:span text:style-name="T33">Build cost (B)</text:span></text:p>
              </table:table-cell>
              <table:table-cell>
                <text:p text:style-name="P21"><text:span text:style-name="T33">Without optimization</text:span></text:p>
              </table:table-cell>
              <table:table-cell>
                <text:p text:style-name="P21"><text:span text:style-name="T33">With optimization</text:span></text:p>
              </table:table-cell>
              <table:table-cell>
                <text:p text:style-name="P21"><text:span text:style-name="T33">Verdict</text:span></text:p>
              </table:table-cell>
            </table:table-row>
            <table:table-row table:style-name="ro1" table:default-cell-style-name="ce2">
              <table:table-cell>
                <text:p text:style-name="P21"><text:span text:style-name="T34">200 friends × 5 000 bag</text:span></text:p>
              </table:table-cell>
              <table:table-cell>
                <text:p text:style-name="P21"><text:span text:style-name="T35">1 000 000 probes</text:span></text:p>
              </table:table-cell>
              <table:table-cell>
                <text:p text:style-name="P21"><text:span text:style-name="T35">14 000 reads</text:span></text:p>
              </table:table-cell>
              <table:table-cell>
                <text:p text:style-name="P21"><text:span text:style-name="T35">1 000 000 vertex loads</text:span></text:p>
              </table:table-cell>
              <table:table-cell>
                <text:p text:style-name="P21"><text:span text:style-name="T35">16 000 I/O</text:span></text:p>
              </table:table-cell>
              <table:table-cell>
                <text:p text:style-name="P21"><text:span text:style-name="T35">WIN <text:s/>(62×)</text:span></text:p>
              </table:table-cell>
            </table:table-row>
            <table:table-row table:style-name="ro1" table:default-cell-style-name="ce2">
              <table:table-cell>
                <text:p text:style-name="P21"><text:span text:style-name="T34">10 friends × 50 bag</text:span></text:p>
              </table:table-cell>
              <table:table-cell>
                <text:p text:style-name="P21"><text:span text:style-name="T35">500 probes</text:span></text:p>
              </table:table-cell>
              <table:table-cell>
                <text:p text:style-name="P21"><text:span text:style-name="T35">14 000 reads</text:span></text:p>
              </table:table-cell>
              <table:table-cell>
                <text:p text:style-name="P21"><text:span text:style-name="T35">500 vertex loads</text:span></text:p>
              </table:table-cell>
              <table:table-cell>
                <text:p text:style-name="P21"><text:span text:style-name="T35">14 050 I/O</text:span></text:p>
              </table:table-cell>
              <table:table-cell>
                <text:p text:style-name="P21"><text:span text:style-name="T35">LOSS (28×)</text:span></text:p>
              </table:table-cell>
            </table:table-row>
            <table:table-row table:style-name="ro1" table:default-cell-style-name="ce2">
              <table:table-cell>
                <text:p text:style-name="P21"><text:span text:style-name="T34">3 friends × 500 bag</text:span></text:p>
              </table:table-cell>
              <table:table-cell>
                <text:p text:style-name="P21"><text:span text:style-name="T35">1 500 probes</text:span></text:p>
              </table:table-cell>
              <table:table-cell>
                <text:p text:style-name="P21"><text:span text:style-name="T35">14 000 reads</text:span></text:p>
              </table:table-cell>
              <table:table-cell>
                <text:p text:style-name="P21"><text:span text:style-name="T35">1 500 vertex loads</text:span></text:p>
              </table:table-cell>
              <table:table-cell>
                <text:p text:style-name="P21"><text:span text:style-name="T35">14 015 I/O</text:span></text:p>
              </table:table-cell>
              <table:table-cell>
                <text:p text:style-name="P21"><text:span text:style-name="T35">LOSS (9×)</text:span></text:p>
              </table:table-cell>
            </table:table-row>
          </table:table>
          <draw:image xlink:href="Pictures/TablePreview1.svm" xlink:type="simple" xlink:show="embed" xlink:actuate="onLoad"/>
        </draw:frame>
        <draw:custom-shape draw:name="TextBox 5" draw:style-name="gr87" draw:text-style-name="P2" draw:layer="layout" svg:width="30.818cm" svg:height="2.495cm" svg:x="1.524cm" svg:y="12.222cm">
          <text:p text:style-name="P1"><text:span text:style-name="T20">Consequence</text:span></text:p>
          <text:p text:style-name="P1"><text:span text:style-name="T29">• </text:span><text:span text:style-name="T29">Building the index-backed RidSet is </text:span><text:span text:style-name="T25">not always profitable</text:span></text:p>
          <text:p text:style-name="P1"><text:span text:style-name="T29">• </text:span><text:span text:style-name="T29">We need a </text:span><text:span text:style-name="T25">runtime decision</text:span><text:span text:style-name="T29">: should this edge build the set, or should it skip the optimization?</text:span><text:span text:style-name="T25">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8"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Here's where it gets interesting. The index scan itself costs about 14,000 I/O reads. That's the BUILD COST — paid once per query if we choose to build. Three scenarios in the table. First scenario: 200 friends each with 5000-RID bags. One million traversals; building 14,000 pays back 62 times. Clear win. Second: 10 friends, 50-RID bags each. 500 traversals; building 14,000 is a 28× LOSS. Third: 3 friends with 500-RID bags. 1500 traversals; same story, 9× loss. The same code path can be a 62× win OR a 28× loss depending purely on traversal volume. The next half of this talk is about HOW we decide.</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9" draw:style-name="dp1" draw:master-page-name="Blank">
        <draw:custom-shape draw:name="TextBox 1" draw:style-name="gr88" draw:text-style-name="P2" draw:layer="layout" svg:width="31.241cm" svg:height="1.437cm" svg:x="1.27cm" svg:y="0.762cm">
          <text:p text:style-name="P1"><text:span text:style-name="T6">The descriptor — what gets attached to the 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9" draw:text-style-name="P2" draw:layer="layout" svg:width="31.241cm" svg:height="1.013cm" svg:x="1.27cm" svg:y="2.54cm">
          <text:p text:style-name="P1"><text:span text:style-name="T7">A small object the planner creates and the runtime con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0" draw:text-style-name="P7" draw:layer="layout" svg:width="30.818cm" svg:height="7.965cm" svg:x="1.524cm" svg:y="3.75cm">
          <text:p text:style-name="P1"><text:span text:style-name="T8">record IndexLookup(IndexSearchDescriptor indexDescriptor) {</text:span></text:p>
          <text:p text:style-name="P1"><text:span text:style-name="T8"/></text:p>
          <text:p text:style-name="P1"><text:span text:style-name="T8"><text:s text:c="2"/></text:span><text:span text:style-name="T8">// cheap estimate before deciding to build</text:span></text:p>
          <text:p text:style-name="P1"><text:span text:style-name="T8"><text:s text:c="2"/></text:span><text:span text:style-name="T8">estimatedSize() <text:s text:c="8"/>→ indexDescriptor.estimateHits() <text:s text:c="2"/>// histogram, O(1)</text:span></text:p>
          <text:p text:style-name="P1"><text:span text:style-name="T8"/></text:p>
          <text:p text:style-name="P1"><text:span text:style-name="T8"><text:s text:c="2"/></text:span><text:span text:style-name="T8">// actually run the index scan and materialise the bitmap</text:span></text:p>
          <text:p text:style-name="P1"><text:span text:style-name="T8"><text:s text:c="2"/></text:span><text:span text:style-name="T8">resolve() <text:s text:c="14"/>→ run index scan → fill RidSet</text:span></text:p>
          <text:p text:style-name="P1"><text:span text:style-name="T8"/></text:p>
          <text:p text:style-name="P1"><text:span text:style-name="T8"><text:s text:c="2"/></text:span><text:span text:style-name="T8">// cache lookup key — same index + same condition → same RidSet</text:span></text:p>
          <text:p text:style-name="P1"><text:span text:style-name="T8"><text:s text:c="2"/></text:span><text:span text:style-name="T8">cacheKey() <text:s text:c="13"/>→ indexDescriptor.cacheFingerprint()</text:span></text:p>
          <text:p text:style-name="P1"><text:span text:style-name="T8"/></text:p>
          <text:p text:style-name="P1"><text:span text:style-name="T8"><text:s text:c="2"/></text:span><text:span text:style-name="T8">// gate 1</text:span></text:p>
          <text:p text:style-name="P1"><text:span text:style-name="T8"><text:s text:c="2"/></text:span><text:span text:style-name="T8">passesSelectivityCheck() → estimateSelectivity() ≤ 0.95</text:span></text:p>
          <text:p text:style-name="P1"><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1" draw:text-style-name="P2" draw:layer="layout" svg:width="30.818cm" svg:height="4.737cm" svg:x="1.524cm" svg:y="12.194cm">
          <text:p text:style-name="P1"><text:span text:style-name="T25">The fingerprint = index name + key condition + range condition</text:span></text:p>
          <text:p text:style-name="P1"><text:span text:style-name="T32">• </text:span><text:span text:style-name="T32">Same index used twice with different conditions must NOT share a cache entry</text:span></text:p>
          <text:p text:style-name="P1"><text:span text:style-name="T32"/></text:p>
          <text:p text:style-name="P1"><text:span text:style-name="T26"/></text:p>
          <text:p text:style-name="P1"><text:span text:style-name="T25">Where it's attached: </text:span><text:span text:style-name="T31">MatchExecutionPlanner.optimizeScheduleWithIntersections</text:span></text:p>
          <text:p text:style-name="P1"><text:span text:style-name="T25">Where it's consumed: </text:span><text:span text:style-name="T31">EdgeTraversal.resolveWithCache</text:span><text:span text:style-name="T29"> (cache + gates) and </text:span><text:span text:style-name="T31">MatchEdgeTraverser.applyPreFilter</text:span><text:span text:style-name="T29"> (per-vert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9"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The descriptor is a record with four methods. estimatedSize gives a histogram-based hit count — fast, O(1). resolve actually runs the index scan and builds the bitmap — slow, paid once. cacheKey returns a fingerprint that includes index name, key condition, and range condition — so two IndexLookups on the same index with different parameters get different cache slots. passesSelectivityCheck is gate 1. Important historical note: the fingerprint used to be index.getName alone, which would have aliased two IndexLookups on the same index with different conditions. The collision was latent — today's planner emits at most one IndexLookup per edge — but the fingerprint fix pins correctness on data instead of on planner discipline. One PR change away from a silent bug.</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10" draw:style-name="dp1" draw:master-page-name="Blank">
        <draw:custom-shape draw:name="TextBox 1" draw:style-name="gr92" draw:text-style-name="P2" draw:layer="layout" svg:width="31.241cm" svg:height="1.437cm" svg:x="1.27cm" svg:y="0.762cm">
          <text:p text:style-name="P1"><text:span text:style-name="T6">Gate 1 — is the filter selective enough a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3" draw:text-style-name="P2" draw:layer="layout" svg:width="31.241cm" svg:height="1.013cm" svg:x="1.27cm" svg:y="2.54cm">
          <text:p text:style-name="P1"><text:span text:style-name="T7">Skip the optimization when the filter passes almost everything throug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4" draw:text-style-name="P7" draw:layer="layout" svg:width="30.818cm" svg:height="1.521cm" svg:x="1.567cm" svg:y="4.445cm">
          <text:p text:style-name="P1"><text:span text:style-name="T27">selectivity = hits / classTotalCount <text:s text:c="5"/>∈ [0, 1]</text:span></text:p>
          <text:p text:style-name="P1"><text:span text:style-name="T27">pass <text:s/>⇔ <text:s/>selectivity ≤ 0.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95" draw:text-style-name="P2" draw:layer="layout" svg:width="31.241cm" svg:height="1.013cm" svg:x="1.27cm" svg:y="11cm">
          <text:p text:style-name="P1"><text:span text:style-name="T7">Break-even math: how many traversals </text:span><text:span text:style-name="T7">before the index scan is recove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6" draw:text-style-name="P2" draw:layer="layout" svg:width="31.241cm" svg:height="1.437cm" svg:x="1.27cm" svg:y="9.095cm">
          <text:p text:style-name="P1"><text:span text:style-name="T6">Gate 2 — will the </text:span><text:span text:style-name="T6">traversal volume pay </text:span><text:span text:style-name="T6">back the b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97" draw:text-style-name="P7" draw:layer="layout" svg:width="30.818cm" svg:height="5.159cm" svg:x="1.27cm" svg:y="12.67cm">
          <text:p text:style-name="P1"><text:span text:style-name="T36">m <text:s/></text:span><text:span text:style-name="T8">×</text:span><text:span text:style-name="T37"> <text:s/>(1−s)·L <text:s/>= <text:s/>B</text:span></text:p>
          <text:p text:style-name="P1"><text:span text:style-name="T38"/></text:p>
          <text:p text:style-name="P1"><text:span text:style-name="T39">m <text:s/>= <text:s/>B <text:s/>/ <text:s/>(loadToScanRatio × </text:span><text:span text:style-name="T39">(1 − s))</text:span></text:p>
          <text:p text:style-name="P1"><text:span text:style-name="T40"/></text:p>
          <text:p text:style-name="P1"><text:span text:style-name="T40"><text:s text:c="5"/></text:span><text:span text:style-name="T40">B <text:s/>≈ build cost <text:s text:c="2"/>(one I/O per index hit), </text:span></text:p>
          <text:p text:style-name="P1"><text:span text:style-name="T40"><text:tab/></text:span><text:span text:style-name="T40">s = selectivity</text:span></text:p>
          <text:p text:style-name="P1"><text:span text:style-name="T40"><text:s text:c="4"/></text:span><text:span text:style-name="T40">(1 − s)= LinkBag fraction rejected per vertex </text:span><text:span text:style-name="T40">(savings per probe)</text:span></text:p>
          <text:p text:style-name="P1"><text:span text:style-name="T40"><text:s text:c="4"/></text:span><text:span text:style-name="T40">loadToScanRatio <text:s/>= random vertex load vs </text:span><text:span text:style-name="T40">RidSet pro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0"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Gate 1 is fast. Selectivity equals hits divided by class total count — the fraction of the class matching the filter. Threshold 0.95: if the filter rejects fewer than 5 percent of class members, even a free build wouldn't save meaningful work. We skip. The threshold is conservative — break-even on individual probe cost is way out near 0.9997, but 0.95 avoids degenerate cases like "creationDate less than year 3000" that the planner can't reason about. Special case: estimateSelectivity returns minus one when no histogram exists. Then we REJECT — better to skip than optimistically build a RidSet we can't bound. The selectivity check evaluates ONCE per query, not per vertex; result is cached for all subsequent vertices.</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11" draw:style-name="dp1" draw:master-page-name="Blank">
        <draw:custom-shape draw:name="TextBox 1" draw:style-name="gr98" draw:text-style-name="P2" draw:layer="layout" svg:width="31.241cm" svg:height="1.437cm" svg:x="1.27cm" svg:y="0.762cm">
          <text:p text:style-name="P1"><text:span text:style-name="T6">T</text:span><text:span text:style-name="T6">h</text:span><text:span text:style-name="T6">r</text:span><text:span text:style-name="T6">e</text:span><text:span text:style-name="T6">e </text:span><text:span text:style-name="T6">m</text:span><text:span text:style-name="T6">o</text:span><text:span text:style-name="T6">d</text:span><text:span text:style-name="T6">e</text:span><text:span text:style-name="T6">s </text:span><text:span text:style-name="T6">i</text:span><text:span text:style-name="T6">n </text:span><text:span text:style-name="T6">ti</text:span><text:span text:style-name="T6">m</text:span><text:span text:style-name="T6">e </text:span><text:span text:style-name="T6">—</text:span><text:span text:style-name="T6"> </text:span><text:span text:style-name="T6">w</text:span><text:span text:style-name="T6">h</text:span><text:span text:style-name="T6">e</text:span><text:span text:style-name="T6">n </text:span><text:span text:style-name="T6">d</text:span><text:span text:style-name="T6">o</text:span><text:span text:style-name="T6">e</text:span><text:span text:style-name="T6">s </text:span><text:span text:style-name="T6">t</text:span><text:span text:style-name="T6">h</text:span><text:span text:style-name="T6">e </text:span><text:span text:style-name="T6">b</text:span><text:span text:style-name="T6">u</text:span><text:span text:style-name="T6">il</text:span><text:span text:style-name="T6">d </text:span><text:span text:style-name="T6">a</text:span><text:span text:style-name="T6">c</text:span><text:span text:style-name="T6">t</text:span><text:span text:style-name="T6">u</text:span><text:span text:style-name="T6">a</text:span><text:span text:style-name="T6">ll</text:span><text:span text:style-name="T6">y </text:span><text:span text:style-name="T6">fi</text:span><text:span text:style-name="T6">r</text:span><text:span text:style-name="T6">e</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9" draw:text-style-name="P2" draw:layer="layout" svg:width="31.241cm" svg:height="1.013cm" svg:x="1.27cm" svg:y="2.54cm">
          <text:p text:style-name="P1"><text:span text:style-name="T7">St</text:span><text:span text:style-name="T7">re</text:span><text:span text:style-name="T7">a</text:span><text:span text:style-name="T7">m </text:span><text:span text:style-name="T7">of </text:span><text:span text:style-name="T7">so</text:span><text:span text:style-name="T7">ur</text:span><text:span text:style-name="T7">ce </text:span><text:span text:style-name="T7">ve</text:span><text:span text:style-name="T7">rti</text:span><text:span text:style-name="T7">ce</text:span><text:span text:style-name="T7">s </text:span><text:span text:style-name="T7">en</text:span><text:span text:style-name="T7">te</text:span><text:span text:style-name="T7">ri</text:span><text:span text:style-name="T7">ng </text:span><text:span text:style-name="T7">th</text:span><text:span text:style-name="T7">e </text:span><text:span text:style-name="T7">ed</text:span><text:span text:style-name="T7">ge </text:span><text:span text:style-name="T7">— </text:span><text:span text:style-name="T7">th</text:span><text:span text:style-name="T7">re</text:span><text:span text:style-name="T7">e </text:span><text:span text:style-name="T7">dif</text:span><text:span text:style-name="T7">fer</text:span><text:span text:style-name="T7">en</text:span><text:span text:style-name="T7">t </text:span><text:span text:style-name="T7">bu</text:span><text:span text:style-name="T7">ild </text:span><text:span text:style-name="T7">tri</text:span><text:span text:style-name="T7">gg</text:span><text:span text:style-name="T7">er</text:span><text:span text:style-name="T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100" draw:text-style-name="P22" draw:layer="layout" svg:width="6.666cm" svg:height="3.332cm" svg:x="1.524cm" svg:y="4.167cm">
          <text:p text:style-name="P9"><text:span text:style-name="T41">BU</text:span><text:span text:style-name="T41">ILD</text:span><text:span text:style-name="T41">_EA</text:span><text:span text:style-name="T41">GE</text:span><text:span text:style-name="T41">R</text:span></text:p>
          <text:p text:style-name="P9"><text:span text:style-name="T41"/></text:p>
          <text:p text:style-name="P9"><text:span text:style-name="T41">bui</text:span><text:span text:style-name="T41">ld </text:span><text:span text:style-name="T41">on </text:span><text:span text:style-name="T41">firs</text:span><text:span text:style-name="T41">t </text:span><text:span text:style-name="T41">qu</text:span><text:span text:style-name="T41">alif</text:span><text:span text:style-name="T41">yin</text:span><text:span text:style-name="T41">g</text:span></text:p>
          <text:p text:style-name="P9"><text:span text:style-name="T41">ver</text:span><text:span text:style-name="T41">te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4" draw:style-name="gr101" draw:text-style-name="P23" draw:layer="layout" svg:width="1.055cm" svg:height="1.055cm" svg:x="8.472cm" svg:y="5.278cm">
          <text:p text:style-name="P9"><text:span text:style-name="T42">v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2" draw:text-style-name="P24" draw:layer="layout" svg:width="1.055cm" svg:height="1.055cm" svg:x="9.694cm" svg:y="5.278cm">
          <text:p text:style-name="P9"><text:span text:style-name="T43">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3" draw:text-style-name="P24" draw:layer="layout" svg:width="1.055cm" svg:height="1.055cm" svg:x="10.917cm" svg:y="5.278cm">
          <text:p text:style-name="P9"><text:span text:style-name="T43">v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4" draw:text-style-name="P24" draw:layer="layout" svg:width="1.055cm" svg:height="1.055cm" svg:x="12.139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5" draw:text-style-name="P24" draw:layer="layout" svg:width="1.055cm" svg:height="1.055cm" svg:x="13.361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6" draw:text-style-name="P24" draw:layer="layout" svg:width="1.055cm" svg:height="1.055cm" svg:x="14.583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7" draw:text-style-name="P24" draw:layer="layout" svg:width="1.055cm" svg:height="1.055cm" svg:x="15.806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8" draw:text-style-name="P24" draw:layer="layout" svg:width="1.055cm" svg:height="1.055cm" svg:x="17.028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9" draw:text-style-name="P24" draw:layer="layout" svg:width="1.055cm" svg:height="1.055cm" svg:x="18.25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0" draw:text-style-name="P24" draw:layer="layout" svg:width="1.055cm" svg:height="1.055cm" svg:x="19.472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1" draw:text-style-name="P24" draw:layer="layout" svg:width="1.055cm" svg:height="1.055cm" svg:x="20.694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2" draw:text-style-name="P24" draw:layer="layout" svg:width="1.055cm" svg:height="1.055cm" svg:x="21.917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3" draw:text-style-name="P24" draw:layer="layout" svg:width="1.055cm" svg:height="1.055cm" svg:x="23.139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14" draw:text-style-name="P24" draw:layer="layout" svg:width="1.055cm" svg:height="1.055cm" svg:x="24.361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5" draw:text-style-name="P24" draw:layer="layout" svg:width="1.055cm" svg:height="1.055cm" svg:x="25.583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16" draw:text-style-name="P24" draw:layer="layout" svg:width="1.055cm" svg:height="1.055cm" svg:x="26.806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17" draw:text-style-name="P24" draw:layer="layout" svg:width="1.055cm" svg:height="1.055cm" svg:x="28.028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18" draw:text-style-name="P24" draw:layer="layout" svg:width="1.055cm" svg:height="1.055cm" svg:x="29.25cm" svg:y="5.278cm">
          <text:p text:style-name="P9"><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19" draw:text-style-name="P2" draw:layer="layout" svg:width="6.943cm" svg:height="1.353cm" svg:x="8.472cm" svg:y="3.789cm">
          <text:p text:style-name="P1"><text:span text:style-name="T41">▲ </text:span><text:span text:style-name="T41">BUILD here (14k I/O) — then filter v1..v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120" draw:text-style-name="P22" draw:layer="layout" svg:width="6.666cm" svg:height="3.332cm" svg:x="1.524cm" svg:y="9.167cm">
          <text:p text:style-name="P9"><text:span text:style-name="T44">DEFERRED_WITH_NET</text:span></text:p>
          <text:p text:style-name="P9"><text:span text:style-name="T44"/></text:p>
          <text:p text:style-name="P9"><text:span text:style-name="T44">accumulate, build when</text:span></text:p>
          <text:p text:style-name="P9"><text:span text:style-name="T44">total ≥ T = max(2·F, 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24" draw:style-name="gr121" draw:text-style-name="P24" draw:layer="layout" svg:width="1.055cm" svg:height="1.055cm" svg:x="8.472cm" svg:y="10.278cm">
          <text:p text:style-name="P9"><text:span text:style-name="T45">v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2" draw:text-style-name="P24" draw:layer="layout" svg:width="1.055cm" svg:height="1.055cm" svg:x="9.694cm" svg:y="10.278cm">
          <text:p text:style-name="P9"><text:span text:style-name="T45">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3" draw:text-style-name="P24" draw:layer="layout" svg:width="1.055cm" svg:height="1.055cm" svg:x="10.917cm" svg:y="10.278cm">
          <text:p text:style-name="P9"><text:span text:style-name="T45">v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4" draw:text-style-name="P24" draw:layer="layout" svg:width="1.055cm" svg:height="1.055cm" svg:x="12.139cm" svg:y="10.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5" draw:text-style-name="P24" draw:layer="layout" svg:width="1.055cm" svg:height="1.055cm" svg:x="13.361cm" svg:y="10.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6" draw:text-style-name="P24" draw:layer="layout" svg:width="1.055cm" svg:height="1.055cm" svg:x="14.583cm" svg:y="10.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7" draw:text-style-name="P24" draw:layer="layout" svg:width="1.055cm" svg:height="1.055cm" svg:x="15.806cm" svg:y="10.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28" draw:text-style-name="P24" draw:layer="layout" svg:width="1.055cm" svg:height="1.055cm" svg:x="17.028cm" svg:y="10.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29" draw:text-style-name="P24" draw:layer="layout" svg:width="1.055cm" svg:height="1.055cm" svg:x="18.25cm" svg:y="10.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30" draw:text-style-name="P24" draw:layer="layout" svg:width="1.055cm" svg:height="1.055cm" svg:x="19.472cm" svg:y="10.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31" draw:text-style-name="P24" draw:layer="layout" svg:width="1.055cm" svg:height="1.055cm" svg:x="20.694cm" svg:y="10.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32" draw:text-style-name="P25" draw:layer="layout" svg:width="1.055cm" svg:height="1.055cm" svg:x="21.917cm" svg:y="10.278cm">
          <text:p text:style-name="P9"><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33" draw:text-style-name="P24" draw:layer="layout" svg:width="1.055cm" svg:height="1.055cm" svg:x="23.139cm" svg:y="10.278cm">
          <text:p text:style-name="P9"><text:span text:style-name="T47">v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34" draw:text-style-name="P24" draw:layer="layout" svg:width="1.055cm" svg:height="1.055cm" svg:x="24.361cm" svg:y="10.278cm">
          <text:p text:style-name="P9"><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5" draw:text-style-name="P24" draw:layer="layout" svg:width="1.055cm" svg:height="1.055cm" svg:x="25.583cm" svg:y="10.278cm">
          <text:p text:style-name="P9"><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36" draw:text-style-name="P24" draw:layer="layout" svg:width="1.055cm" svg:height="1.055cm" svg:x="26.806cm" svg:y="10.278cm">
          <text:p text:style-name="P9"><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37" draw:text-style-name="P24" draw:layer="layout" svg:width="1.055cm" svg:height="1.055cm" svg:x="28.028cm" svg:y="10.278cm">
          <text:p text:style-name="P9"><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38" draw:text-style-name="P24" draw:layer="layout" svg:width="1.055cm" svg:height="1.055cm" svg:x="29.25cm" svg:y="10.278cm">
          <text:p text:style-name="P9"><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39" draw:text-style-name="P2" draw:layer="layout" svg:width="12.221cm" svg:height="0.759cm" svg:x="8.472cm" svg:y="9.389cm">
          <text:p text:style-name="P1"><text:span text:style-name="T48">v1..v11 paid full vertex-load cost (no filter y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40" draw:text-style-name="P2" draw:layer="layout" svg:width="9.721cm" svg:height="0.759cm" svg:x="19.972cm" svg:y="11.75cm">
          <text:p text:style-name="P1"><text:span text:style-name="T49">▲ </text:span><text:span text:style-name="T49">accumulator reached T, BUILD 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4" draw:style-name="gr141" draw:text-style-name="P22" draw:layer="layout" svg:width="6.666cm" svg:height="3.332cm" svg:x="1.524cm" svg:y="14.167cm">
          <text:p text:style-name="P9"><text:span text:style-name="T50">REJECT</text:span></text:p>
          <text:p text:style-name="P9"><text:span text:style-name="T50"/></text:p>
          <text:p text:style-name="P9"><text:span text:style-name="T50">no build, ever</text:span></text:p>
          <text:p text:style-name="P9"><text:span text:style-name="T50">(volume too low)</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45" draw:style-name="gr142" draw:text-style-name="P24" draw:layer="layout" svg:width="1.055cm" svg:height="1.055cm" svg:x="8.472cm" svg:y="15.278cm">
          <text:p text:style-name="P9"><text:span text:style-name="T45">v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43" draw:text-style-name="P24" draw:layer="layout" svg:width="1.055cm" svg:height="1.055cm" svg:x="9.694cm" svg:y="15.278cm">
          <text:p text:style-name="P9"><text:span text:style-name="T45">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44" draw:text-style-name="P24" draw:layer="layout" svg:width="1.055cm" svg:height="1.055cm" svg:x="10.917cm" svg:y="15.278cm">
          <text:p text:style-name="P9"><text:span text:style-name="T45">v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45" draw:text-style-name="P24" draw:layer="layout" svg:width="1.055cm" svg:height="1.055cm" svg:x="12.139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46" draw:text-style-name="P24" draw:layer="layout" svg:width="1.055cm" svg:height="1.055cm" svg:x="13.361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47" draw:text-style-name="P24" draw:layer="layout" svg:width="1.055cm" svg:height="1.055cm" svg:x="14.583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48" draw:text-style-name="P24" draw:layer="layout" svg:width="1.055cm" svg:height="1.055cm" svg:x="15.806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9" draw:text-style-name="P24" draw:layer="layout" svg:width="1.055cm" svg:height="1.055cm" svg:x="17.028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0" draw:text-style-name="P24" draw:layer="layout" svg:width="1.055cm" svg:height="1.055cm" svg:x="18.25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51" draw:text-style-name="P24" draw:layer="layout" svg:width="1.055cm" svg:height="1.055cm" svg:x="19.472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52" draw:text-style-name="P24" draw:layer="layout" svg:width="1.055cm" svg:height="1.055cm" svg:x="20.694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53" draw:text-style-name="P24" draw:layer="layout" svg:width="1.055cm" svg:height="1.055cm" svg:x="21.917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54" draw:text-style-name="P24" draw:layer="layout" svg:width="1.055cm" svg:height="1.055cm" svg:x="23.139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55" draw:text-style-name="P24" draw:layer="layout" svg:width="1.055cm" svg:height="1.055cm" svg:x="24.361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56" draw:text-style-name="P24" draw:layer="layout" svg:width="1.055cm" svg:height="1.055cm" svg:x="25.583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57" draw:text-style-name="P24" draw:layer="layout" svg:width="1.055cm" svg:height="1.055cm" svg:x="26.806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58" draw:text-style-name="P24" draw:layer="layout" svg:width="1.055cm" svg:height="1.055cm" svg:x="28.028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59" draw:text-style-name="P24" draw:layer="layout" svg:width="1.055cm" svg:height="1.055cm" svg:x="29.25cm" svg:y="15.278cm">
          <text:p text:style-name="P9"><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60" draw:text-style-name="P2" draw:layer="layout" svg:width="12.221cm" svg:height="0.759cm" svg:x="8.472cm" svg:y="14.389cm">
          <text:p text:style-name="P1"><text:span text:style-name="T48">every vertex loaded fully — no filter attemp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61" draw:text-style-name="P2" draw:layer="layout" svg:width="30.818cm" svg:height="0.844cm" svg:x="1.524cm" svg:y="18.056cm">
          <text:p text:style-name="P1"><text:span text:style-name="T51">Legend: <text:s/></text:span><text:span text:style-name="T12">green = filter applied</text:span><text:span text:style-name="T51"> <text:s text:c="3"/>· <text:s text:c="3"/></text:span><text:span text:style-name="T11">red = no filter (full load)</text:span><text:span text:style-name="T51"> <text:s text:c="3"/>· <text:s text:c="3"/></text:span><text:span text:style-name="T14">◆ = build trig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4" draw:layer="layout" svg:width="12.699cm" svg:height="9.524cm" svg:x="3.175cm" svg:y="1.905cm" draw:page-number="11" presentation:class="page"/>
          <draw:frame draw:name="Notes Placeholder 2" presentation:style-name="pr1" draw:text-style-name="P16" draw:layer="layout" svg:width="15.239cm" svg:height="11.429cm" svg:x="1.905cm" svg:y="12.065cm" presentation:class="notes" presentation:user-transformed="true">
            <draw:text-box>
              <text:p text:style-name="P20"><text:span text:style-name="T4">Visual of the three modes in time. Top row, BUILD_EAGER — vertex 1 triggers the build, every subsequent vertex gets filtered. Build cost amortized across 200 traversals. Middle row, DEFERRED_WITH_NET — vertices 1 through 11 process at full unfiltered cost (these are the deferral-tax neighbors we discussed), accumulator reaches T at vertex 12, build fires, remaining 188 vertices get filtered. The math has to work out that the deferral-phase loss is less than the build's savings on the remaining vertices — that's why T has the m floor. Bottom row, REJECT — every vertex loaded fully. No optimization, no build. That's the contract for unknown-selectivity case: better to be slow but predictable than to build an unbounded RidSet we can't reason about.</text:span></text:p>
            </draw:text-box>
          </draw:frame>
          <draw:frame draw:name="Slide Number Placeholder 3" presentation:style-name="pr2" draw:text-style-name="P17"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12" draw:style-name="dp1" draw:master-page-name="Blank">
        <draw:custom-shape draw:name="TextBox 1" draw:style-name="gr162" draw:text-style-name="P2" draw:layer="layout" svg:width="31.241cm" svg:height="1.437cm" svg:x="1.27cm" svg:y="0.762cm">
          <text:p text:style-name="P1"><text:span text:style-name="T6">Three modes — eager, deferred, re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63" draw:text-style-name="P2" draw:layer="layout" svg:width="31.241cm" svg:height="1.013cm" svg:x="1.27cm" svg:y="2.54cm">
          <text:p text:style-name="P1"><text:span text:style-name="T7">Decided once per edge at the first call, then memo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gr86" draw:layer="layout" svg:width="30.831cm" svg:height="7.499cm" svg:x="1.524cm" svg:y="3.75cm">
          <table:table>
            <table:table-column table:style-name="co5"/>
            <table:table-column table:style-name="co6"/>
            <table:table-column table:style-name="co7"/>
            <table:table-row table:style-name="ro2" table:default-cell-style-name="ce1">
              <table:table-cell>
                <text:p text:style-name="P21"><text:span text:style-name="T33">Mode</text:span></text:p>
              </table:table-cell>
              <table:table-cell>
                <text:p text:style-name="P21"><text:span text:style-name="T33">Condition</text:span></text:p>
              </table:table-cell>
              <table:table-cell>
                <text:p text:style-name="P21"><text:span text:style-name="T33">Runtime action</text:span></text:p>
              </table:table-cell>
            </table:table-row>
            <table:table-row table:style-name="ro2" table:default-cell-style-name="ce2">
              <table:table-cell>
                <text:p text:style-name="P21"><text:span text:style-name="T34">BUILD_EAGER</text:span></text:p>
              </table:table-cell>
              <table:table-cell>
                <text:p text:style-name="P21"><text:span text:style-name="T35">forecastN &gt; ⌈m⌉ <text:s text:c="2"/>AND <text:s text:c="2"/>sample big enough </text:span></text:p>
              </table:table-cell>
              <table:table-cell>
                <text:p text:style-name="P21"><text:span text:style-name="T35">build on the first qualifying vertex</text:span></text:p>
              </table:table-cell>
            </table:table-row>
            <table:table-row table:style-name="ro2" table:default-cell-style-name="ce2">
              <table:table-cell>
                <text:p text:style-name="P21"><text:span text:style-name="T34">DEFERRED_WITH_NET</text:span></text:p>
              </table:table-cell>
              <table:table-cell>
                <text:p text:style-name="P21"><text:span text:style-name="T35">selectivity known, but eager conditions not met</text:span></text:p>
              </table:table-cell>
              <table:table-cell>
                <text:p text:style-name="P21"><text:span text:style-name="T35">accumulate linkBagSize per vertex; build when total ≥ max(2·forecastN, m)</text:span></text:p>
              </table:table-cell>
            </table:table-row>
            <table:table-row table:style-name="ro2" table:default-cell-style-name="ce2">
              <table:table-cell>
                <text:p text:style-name="P21"><text:span text:style-name="T34">REJECT</text:span></text:p>
              </table:table-cell>
              <table:table-cell>
                <text:p text:style-name="P21"><text:span text:style-name="T35">volume guaranteed too low</text:span></text:p>
              </table:table-cell>
              <table:table-cell>
                <text:p text:style-name="P21"><text:span text:style-name="T35">cache null with skip reason; never retry on this edge</text:span></text:p>
              </table:table-cell>
            </table:table-row>
          </table:table>
          <draw:image xlink:href="Pictures/TablePreview2.svm" xlink:type="simple" xlink:show="embed" xlink:actuate="onLoad"/>
        </draw:frame>
        <draw:custom-shape draw:name="TextBox 4" draw:style-name="gr164" draw:text-style-name="P2" draw:layer="layout" svg:width="30.818cm" svg:height="4.652cm" svg:x="1.524cm" svg:y="11.667cm">
          <text:p text:style-name="P1"><text:span text:style-name="T30"/></text:p>
          <text:p text:style-name="P1"><text:span text:style-name="T32">• </text:span><text:span text:style-name="T32">Forecasts can under-estimate when fan-out is heavy-tailed (one 'whale' vertex with thousands of edges)</text:span></text:p>
          <text:p text:style-name="P1"><text:span text:style-name="T32">• </text:span><text:span text:style-name="T32">The runtime accumulator catches reality: even if forecast said 100, if we actually accumulated 12 000 traversals, the build is now justified</text:span></text:p>
          <text:p text:style-name="P1"><text:span text:style-name="T32">• </text:span><text:span text:style-name="T31">T = max(2·forecastN, m)</text:span><text:span text:style-name="T32"> — the 2× term catches under-forecasts, the m floor catches no-forecast cases</text:span></text:p>
          <text:p text:style-name="P1"><text:span text:style-name="T26"/></text:p>
          <text:p text:style-name="P1"><text:span text:style-name="T32">Once decided, the mode is stored on the EdgeTraversal — no re-evaluation per vert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2"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Three modes table. BUILD_EAGER fires when forecast comfortably exceeds m AND the sample size for the forecast is at least 30 — that's the CLT threshold we cover in two slides. DEFERRED_WITH_NET is the fall-through: selectivity is known but eager conditions not met. Accumulate per-vertex link bag size; when the running total exceeds T equals max of 2 times forecast OR m, build now. The 2× term catches forecast under-estimates — if reality is twice the forecast, the forecast was clearly wrong by enough that a build is justified. The m floor catches the no-forecast case — when we have no useful forecast at all, the m floor takes over. REJECT is for unknown selectivity or guaranteed-low volume — never retry on this edge. Once the mode is decided at the first call, it's memoised on the EdgeTraversal — no re-evaluation per vertex.</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13" draw:style-name="dp1" draw:master-page-name="Blank">
        <draw:custom-shape draw:name="TextBox 1" draw:style-name="gr165" draw:text-style-name="P2" draw:layer="layout" svg:width="31.241cm" svg:height="1.437cm" svg:x="1.27cm" svg:y="0.762cm">
          <text:p text:style-name="P1"><text:span text:style-name="T6">The cache for Rid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66" draw:text-style-name="P2" draw:layer="layout" svg:width="31.241cm" svg:height="1.013cm" svg:x="1.27cm" svg:y="2.54cm">
          <text:p text:style-name="P1"><text:span text:style-name="T7">The whole reason IndexLookup pays back: the RidSet is constant for the 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167" draw:text-style-name="P24" draw:layer="layout" svg:width="6.666cm" svg:height="1.943cm" svg:x="1.944cm" svg:y="4.028cm">
          <text:p text:style-name="P9"><text:span text:style-name="T9">friend_1</text:span></text:p>
          <text:p text:style-name="P9"><text:span text:style-name="T9">(first verte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4" draw:style-name="gr168" draw:text-style-name="P24" draw:layer="layout" svg:width="6.666cm" svg:height="1.943cm" svg:x="13.333cm" svg:y="4.028cm">
          <text:p text:style-name="P9"><text:span text:style-name="T9">friend_50</text:span></text:p>
          <text:p text:style-name="P9"><text:span text:style-name="T9">(la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5" draw:style-name="gr169" draw:text-style-name="P24" draw:layer="layout" svg:width="6.666cm" svg:height="1.943cm" svg:x="24.722cm" svg:y="4.028cm">
          <text:p text:style-name="P9"><text:span text:style-name="T9">friend_200</text:span></text:p>
          <text:p text:style-name="P9"><text:span text:style-name="T9">(las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wn Arrow 6" draw:style-name="gr170" draw:text-style-name="P12" draw:layer="layout" svg:width="0.388cm" svg:height="1.11cm" svg:x="5.083cm" svg:y="5.97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Down Arrow 7" draw:style-name="gr170" draw:text-style-name="P12" draw:layer="layout" svg:width="0.388cm" svg:height="1.11cm" svg:x="16.472cm" svg:y="5.97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Down Arrow 8" draw:style-name="gr170" draw:text-style-name="P12" draw:layer="layout" svg:width="0.388cm" svg:height="1.11cm" svg:x="27.861cm" svg:y="5.97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Rounded Rectangle 9" draw:style-name="gr171" draw:text-style-name="P22" draw:layer="layout" svg:width="6.666cm" svg:height="1.943cm" svg:x="1.944cm" svg:y="8.056cm">
          <text:p text:style-name="P9"><text:span text:style-name="T49">cache MISS</text:span></text:p>
          <text:p text:style-name="P9"><text:span text:style-name="T49">→ </text:span><text:span text:style-name="T49">run gates → resolv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10" draw:style-name="gr172" draw:text-style-name="P22" draw:layer="layout" svg:width="6.666cm" svg:height="1.943cm" svg:x="13.333cm" svg:y="8.056cm">
          <text:p text:style-name="P9"><text:span text:style-name="T52">cache HIT (RidSet)</text:span></text:p>
          <text:p text:style-name="P9"><text:span text:style-name="T52">→ </text:span><text:span text:style-name="T52">reuse stored bit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11" draw:style-name="gr173" draw:text-style-name="P22" draw:layer="layout" svg:width="6.666cm" svg:height="1.943cm" svg:x="24.722cm" svg:y="8.056cm">
          <text:p text:style-name="P9"><text:span text:style-name="T52">cache HIT (RidSet)</text:span></text:p>
          <text:p text:style-name="P9"><text:span text:style-name="T52">→ </text:span><text:span text:style-name="T52">reuse stored bit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wn Arrow 12" draw:style-name="gr170" draw:text-style-name="P12" draw:layer="layout" svg:width="0.388cm" svg:height="1.943cm" svg:x="5.083cm" svg:y="10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Down Arrow 13" draw:style-name="gr170" draw:text-style-name="P12" draw:layer="layout" svg:width="0.388cm" svg:height="1.943cm" svg:x="16.472cm" svg:y="10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Down Arrow 14" draw:style-name="gr170" draw:text-style-name="P12" draw:layer="layout" svg:width="0.388cm" svg:height="1.943cm" svg:x="27.861cm" svg:y="10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custom-shape draw:name="Rounded Rectangle 15" draw:style-name="gr174" draw:text-style-name="P24" draw:layer="layout" svg:width="5.38cm" svg:height="2.499cm" svg:x="14.605cm" svg:y="12.222cm">
          <text:p text:style-name="P9"><text:span text:style-name="T13"><text:s text:c="5"/></text:span><text:span text:style-name="T13">RidSet of 14 000 RID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17" draw:style-name="gr175" draw:text-style-name="P22" draw:layer="layout" svg:width="5.715cm" svg:height="1.527cm" svg:x="2.54cm" svg:y="15.618cm">
          <text:p text:style-name="P9"><text:span text:style-name="T53"><text:s/></text:span><text:span text:style-name="T53">REJECT / BUILD_FAIL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xtBox 18" draw:style-name="gr176" draw:text-style-name="P2" draw:layer="layout" svg:width="30.818cm" svg:height="0.844cm" svg:x="10.457cm" svg:y="17.145cm">
          <text:p text:style-name="P1"><text:span text:style-name="T51">Build cost amortizes: 14 000 reads paid by friend_1, then 199 cache hits for the rest of the 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 draw:style-name="gr177" draw:text-style-name="P24" draw:layer="layout" svg:width="6.65cm" svg:height="2.499cm" svg:x="2.24cm" svg:y="12.106cm">
          <text:p text:style-name="P9"><text:span text:style-name="T13"><text:s text:c="4"/></text:span><text:span text:style-name="T54">BU</text:span><text:span text:style-name="T54">ILD</text:span><text:span text:style-name="T13"> </text:span><text:span text:style-name="T13"><text:s/></text:span><text:span text:style-name="T13">Rid</text:span><text:span text:style-name="T13">Set </text:span><text:span text:style-name="T13">of </text:span><text:span text:style-name="T13">14 </text:span><text:span text:style-name="T13">00</text:span><text:span text:style-name="T13">0 </text:span><text:span text:style-name="T13">RID</text:span><text:span text:style-name="T13">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2" draw:style-name="gr178" draw:text-style-name="P24" draw:layer="layout" svg:width="5.38cm" svg:height="2.499cm" svg:x="26.035cm" svg:y="12.065cm">
          <text:p text:style-name="P9"><text:span text:style-name="T13"><text:s text:c="5"/></text:span><text:span text:style-name="T13">Rid</text:span><text:span text:style-name="T13">Set </text:span><text:span text:style-name="T13">of </text:span><text:span text:style-name="T13">14 </text:span><text:span text:style-name="T13">00</text:span><text:span text:style-name="T13">0 </text:span><text:span text:style-name="T13">RID</text:span><text:span text:style-name="T13">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frame draw:style-name="gr179" draw:text-style-name="P26" draw:layer="layout" svg:width="1.905cm" svg:height="0.962cm" svg:x="4.745cm" svg:y="14.705cm">
          <draw:text-box>
            <text:p>OR</text:p>
          </draw:text-box>
        </draw:frame>
        <presentation:notes draw:style-name="dp2">
          <draw:page-thumbnail draw:name="Slide Image Placeholder 1" draw:style-name="gr4" draw:layer="layout" svg:width="12.699cm" svg:height="9.524cm" svg:x="3.175cm" svg:y="1.905cm" draw:page-number="13"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Visual recap of caching. Friend 1 hits the cache, misses, runs gates, builds, caches the RidSet, applies to its own link bag. Friends 50 and 200 — hundreds of vertices later — hit the cache and reuse the same RidSet for free. The whole reason this optimization is profitable: the index result is constant for the query, so we build once and amortize. The bottom path — cache.put key null plus a skip reason in the parallel map — is the rejection branch. Once we decide an edge isn't worth it, subsequent vertices on that edge skip without re-running gates. Cache capacity is 64 per edge — plenty for any realistic pattern, tiny memory footprint.</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23b" draw:style-name="dp1" draw:master-page-name="Blank">
        <draw:custom-shape draw:name="TextBox 1" draw:style-name="gr180" draw:text-style-name="P2" draw:layer="layout" svg:width="31.241cm" svg:height="1.944cm" svg:x="0.635cm" svg:y="0.635cm">
          <text:p text:style-name="P1"><text:span text:style-name="T1">Skip reas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81" draw:text-style-name="P2" draw:layer="layout" svg:width="30.818cm" svg:height="9.396cm" svg:x="1.567cm" svg:y="4.445cm">
          <text:p text:style-name="P1"><text:span text:style-name="T6">Why these are permanent</text:span></text:p>
          <text:p text:style-name="P1"><text:span text:style-name="T7">• </text:span><text:span text:style-name="T40">SELECTIVITY_TOO_LOW</text:span><text:span text:style-name="T7"> — selectivity is a property of (index, condition, class), invariant for the query</text:span></text:p>
          <text:p text:style-name="P1"><text:span text:style-name="T7">• </text:span><text:span text:style-name="T40">STATS_UNAVAILABLE</text:span><text:span text:style-name="T7"> — missing histogram is a schema fact; doesn't appear mid-query</text:span></text:p>
          <text:p text:style-name="P1"><text:span text:style-name="T7">• </text:span><text:span text:style-name="T40">CAP_EXCEEDED</text:span><text:span text:style-name="T7"> — estimatedSize is class-wide; if it overflows once, it overflows always</text:span></text:p>
          <text:p text:style-name="P1"><text:span text:style-name="T7">• </text:span><text:span text:style-name="T40">BUILD_FAILED</text:span><text:span text:style-name="T7"> — same index, same params, same data → same failure next time</text:span></text:p>
          <text:p text:style-name="P1"><text:span text:style-name="T32"/></text:p>
          <text:p text:style-name="P1"><text:span text:style-name="T6">Why these are NOT cached</text:span></text:p>
          <text:p text:style-name="P1"><text:span text:style-name="T7">• </text:span><text:span text:style-name="T15">BUILD_NOT_AMORTIZED</text:span><text:span text:style-name="T7"> — accumulator may cross T at a later vertex and trigger the build. Caching null would freeze the decision and kill the safety net.</text:span></text:p>
          <text:p text:style-name="P1"><text:span text:style-name="T7">• </text:span><text:span text:style-name="T15">LINKBAG_TOO_SMALL</text:span><text:span text:style-name="T7"> — different source vertices have different bag sizes; a small bag now doesn't mean every bag is sm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4" presentation:class="page"/>
          <draw:frame presentation:style-name="pr1" draw:text-style-name="P27" draw:layer="layout" svg:width="16.799cm" svg:height="13.364cm" svg:x="2.1cm" svg:y="14.107cm" presentation:class="notes" presentation:placeholder="true">
            <draw:text-box/>
          </draw:frame>
        </presentation:notes>
      </draw:page>
      <draw:page draw:name="page24" draw:style-name="dp1" draw:master-page-name="Blank">
        <draw:custom-shape draw:name="TextBox 1" draw:style-name="gr182" draw:text-style-name="P2" draw:layer="layout" svg:width="31.241cm" svg:height="1.437cm" svg:x="1.27cm" svg:y="0.762cm">
          <text:p text:style-name="P1"><text:span text:style-name="T6">How to tell if it's firing — PROFILE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83" draw:text-style-name="P2" draw:layer="layout" svg:width="31.241cm" svg:height="1.013cm" svg:x="1.27cm" svg:y="2.54cm">
          <text:p text:style-name="P1"><text:span text:style-name="T7">Counters per edge + diagnostic strings for every skip 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84" draw:text-style-name="P7" draw:layer="layout" svg:width="30.818cm" svg:height="8.516cm" svg:x="1.524cm" svg:y="3.694cm">
          <text:p text:style-name="P1"><text:span text:style-name="T8">MATCH ... PROFILE:</text:span></text:p>
          <text:p text:style-name="P1"><text:span text:style-name="T8"/></text:p>
          <text:p text:style-name="P1"><text:span text:style-name="T8"><text:s text:c="2"/></text:span><text:span text:style-name="T8">edge: post.hasCreator <text:s text:c="4"/>descriptor: IndexLookup</text:span></text:p>
          <text:p text:style-name="P1"><text:span text:style-name="T8"><text:s text:c="4"/></text:span><text:span text:style-name="T8">preFilter: applied=4823, skipped=0,</text:span></text:p>
          <text:p text:style-name="P1"><text:span text:style-name="T8"><text:s text:c="15"/></text:span><text:span text:style-name="T8">ridSetSize=14210, buildTime=2.1ms, filterRate=0.96</text:span></text:p>
          <text:p text:style-name="P1"><text:span text:style-name="T8"/></text:p>
          <text:p text:style-name="P1"><text:span text:style-name="T8"><text:s text:c="2"/></text:span><text:span text:style-name="T8">edge: forum.containerOf <text:s text:c="2"/>descriptor: IndexLookup</text:span></text:p>
          <text:p text:style-name="P1"><text:span text:style-name="T8"><text:s text:c="4"/></text:span><text:span text:style-name="T8">preFilter: NEVER APPLIED</text:span></text:p>
          <text:p text:style-name="P1"><text:span text:style-name="T8"><text:s text:c="15"/></text:span><text:span text:style-name="T8">(reason: STATS_UNAVAILABLE, </text:span></text:p>
          <text:p text:style-name="P1"><text:span text:style-name="T8"><text:s text:c="16"/></text:span><text:span text:style-name="T8">threshold: selectivity != -1)</text:span></text:p>
          <text:p text:style-name="P1"><text:span text:style-name="T8"/></text:p>
          <text:p text:style-name="P1"><text:span text:style-name="T8"><text:s text:c="2"/></text:span><text:span text:style-name="T8">edge: person.knows <text:s text:c="7"/>descriptor: IndexLookup</text:span></text:p>
          <text:p text:style-name="P1"><text:span text:style-name="T8"><text:s text:c="4"/></text:span><text:span text:style-name="T8">preFilter: NEVER APPLIED</text:span></text:p>
          <text:p text:style-name="P1"><text:span text:style-name="T8"><text:s text:c="15"/></text:span><text:span text:style-name="T8">(reason: BUILD_NOT_AMORTIZED,</text:span></text:p>
          <text:p text:style-name="P1"><text:span text:style-name="T8"><text:s text:c="16"/></text:span><text:span text:style-name="T8">threshold: T = max(2·forecastN, m) = 1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85" draw:text-style-name="P2" draw:layer="layout" svg:width="30.818cm" svg:height="4.652cm" svg:x="1.524cm" svg:y="12.928cm">
          <text:p text:style-name="P1"><text:span text:style-name="T30">What each counter tells you</text:span></text:p>
          <text:p text:style-name="P1"><text:span text:style-name="T32">• </text:span><text:span text:style-name="T31">applied / skipped</text:span><text:span text:style-name="T32"> — how many vertices probed the RidSet vs short-circuited</text:span></text:p>
          <text:p text:style-name="P1"><text:span text:style-name="T32">• </text:span><text:span text:style-name="T31">ridSetSize</text:span><text:span text:style-name="T32"> — actual size after resolve (compare with forecast — was the estimate accurate?)</text:span></text:p>
          <text:p text:style-name="P1"><text:span text:style-name="T32">• </text:span><text:span text:style-name="T31">filterRate</text:span><text:span text:style-name="T32"> — fraction of LinkBag entries the filter rejected. </text:span><text:span text:style-name="T55">0.96</text:span><text:span text:style-name="T32"> = excellent. <text:s/></text:span><text:span text:style-name="T56">&lt; 0.5</text:span><text:span text:style-name="T32"> = consider tuning thresholds.</text:span></text:p>
          <text:p text:style-name="P1"><text:span text:style-name="T26"/></text:p>
          <text:p text:style-name="P1"><text:span text:style-name="T32">Every NEVER APPLIED diagnostic carries its threshold — you can see exactly why it was rejected</text:span></text:p>
          <text:p text:style-name="P1"><text:span text:style-name="T32">Aggregate metric: </text:span><text:span text:style-name="T31">PREFILTER_EFFECTIVENESS</text:span><text:span text:style-name="T32"> — global average filter rate across all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5"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How to verify this in production. PROFILE prints per-edge counters. applied versus skipped count. RidSet size after resolve. Build time in nanos. filter rate — fraction of link bag entries the filter rejected. A 0.96 filter rate means the optimization rejected 96 percent of would-be loads — great. A skip diagnostic carries the threshold value. "NEVER APPLIED reason BUILD_NOT_AMORTIZED threshold T equals 12000" tells you exactly why it didn't fire and how big the volume gap was. Eight enumerable skip reasons cover every code path: NONE, CAP_EXCEEDED, SELECTIVITY_TOO_LOW, BUILD_NOT_AMORTIZED, LINKBAG_TOO_SMALL, OVERLAP_RATIO_TOO_HIGH, BUILD_FAILED, STATS_UNAVAILABLE. Global metric PREFILTER_EFFECTIVENESS aggregates filter rate across all queries — that's your headline operational metric for ops.</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25" draw:style-name="dp1" draw:master-page-name="Blank">
        <draw:custom-shape draw:name="TextBox 1" draw:style-name="gr186" draw:text-style-name="P2" draw:layer="layout" svg:width="31.241cm" svg:height="1.437cm" svg:x="1.27cm" svg:y="0.762cm">
          <text:p text:style-name="P1"><text:span text:style-name="T6">Measured impact — LDBC SNB SF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87" draw:text-style-name="P2" draw:layer="layout" svg:width="31.241cm" svg:height="1.013cm" svg:x="1.27cm" svg:y="2.54cm">
          <text:p text:style-name="P1"><text:span text:style-name="T7">Single-thread / multi-thread % speed-up, baselines independent per r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gr86" draw:layer="layout" svg:width="30.554cm" svg:height="6.939cm" svg:x="1.524cm" svg:y="7.733cm">
          <table:table>
            <table:table-column table:style-name="co8"/>
            <table:table-column table:style-name="co9"/>
            <table:table-column table:style-name="co9"/>
            <table:table-column table:style-name="co10"/>
            <table:table-row table:style-name="ro3" table:default-cell-style-name="ce1">
              <table:table-cell>
                <text:p text:style-name="P21"><text:span text:style-name="T33">LDBC query</text:span></text:p>
              </table:table-cell>
              <table:table-cell>
                <text:p text:style-name="P21"><text:span text:style-name="T33">Δ% ST</text:span></text:p>
              </table:table-cell>
              <table:table-cell>
                <text:p text:style-name="P21"><text:span text:style-name="T33">Δ% MT</text:span></text:p>
              </table:table-cell>
              <table:table-cell>
                <text:p text:style-name="P21"><text:span text:style-name="T33">What fires</text:span></text:p>
              </table:table-cell>
            </table:table-row>
            <table:table-row table:style-name="ro3" table:default-cell-style-name="ce2">
              <table:table-cell>
                <text:p text:style-name="P21"><text:span text:style-name="T34">IC3 friendsInCountries</text:span></text:p>
              </table:table-cell>
              <table:table-cell>
                <text:p text:style-name="P21"><text:span text:style-name="T35">+1117%</text:span></text:p>
              </table:table-cell>
              <table:table-cell>
                <text:p text:style-name="P21"><text:span text:style-name="T35">+929%</text:span></text:p>
              </table:table-cell>
              <table:table-cell>
                <text:p text:style-name="P21"><text:span text:style-name="T35">two IndexLookups: creationDate range + name IN list</text:span></text:p>
              </table:table-cell>
            </table:table-row>
            <table:table-row table:style-name="ro3" table:default-cell-style-name="ce2">
              <table:table-cell>
                <text:p text:style-name="P21"><text:span text:style-name="T34">IC9 recentFofMessages</text:span></text:p>
              </table:table-cell>
              <table:table-cell>
                <text:p text:style-name="P21"><text:span text:style-name="T35">+483%</text:span></text:p>
              </table:table-cell>
              <table:table-cell>
                <text:p text:style-name="P21"><text:span text:style-name="T35">+433%</text:span></text:p>
              </table:table-cell>
              <table:table-cell>
                <text:p text:style-name="P21"><text:span text:style-name="T35">IndexLookup on creationDate</text:span></text:p>
              </table:table-cell>
            </table:table-row>
            <table:table-row table:style-name="ro3" table:default-cell-style-name="ce2">
              <table:table-cell>
                <text:p text:style-name="P21"><text:span text:style-name="T34">IS7 messageReplies</text:span></text:p>
              </table:table-cell>
              <table:table-cell>
                <text:p text:style-name="P21"><text:span text:style-name="T35">+220%</text:span></text:p>
              </table:table-cell>
              <table:table-cell>
                <text:p text:style-name="P21"><text:span text:style-name="T35">+212%</text:span></text:p>
              </table:table-cell>
              <table:table-cell>
                <text:p text:style-name="P21"><text:span text:style-name="T35">IndexLookup on edge target property</text:span></text:p>
              </table:table-cell>
            </table:table-row>
            <table:table-row table:style-name="ro3" table:default-cell-style-name="ce2">
              <table:table-cell>
                <text:p text:style-name="P21"><text:span text:style-name="T34">IC13 shortestPath</text:span></text:p>
              </table:table-cell>
              <table:table-cell>
                <text:p text:style-name="P21"><text:span text:style-name="T35">+7%</text:span></text:p>
              </table:table-cell>
              <table:table-cell>
                <text:p text:style-name="P21"><text:span text:style-name="T35">+8%</text:span></text:p>
              </table:table-cell>
              <table:table-cell>
                <text:p text:style-name="P21"><text:span text:style-name="T35">smaller RidSets thanks to CLT-bounded BUILD_EAGER</text:span></text:p>
              </table:table-cell>
            </table:table-row>
          </table:table>
          <draw:image xlink:href="Pictures/TablePreview3.svm" xlink:type="simple" xlink:show="embed" xlink:actuate="onLoad"/>
        </draw:frame>
        <presentation:notes draw:style-name="dp2">
          <draw:page-thumbnail draw:name="Slide Image Placeholder 1" draw:style-name="gr4" draw:layer="layout" svg:width="12.699cm" svg:height="9.524cm" svg:x="3.175cm" svg:y="1.905cm" draw:page-number="16"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LDBC SNB SF1 numbers, single-thread and multi-thread percentage speedups against own-baseline. IC3 — two IndexLookups stacked on one pattern, biggest gain. IC9 — single IndexLookup on creationDate. IS7 — index on edge target property. IC13 — a modest 7 percent. That one is interesting — IC13 doesn't have an IndexLookup attached. The 7 percent comes from the CLT gate PREVENTING a BUILD_EAGER mis-fire that would have happened with the old logic. So the gates aren't just for capturing gains; they prevent regressions too. Percentages are not additive across queries — each row is its own measurement against its own baseline. What's NOT in this table: queries where the gates correctly chose not to build. Those stay at baseline. No regression. That's the bounded-loss contract from the earlier slide actually delivering in measurements.</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26" draw:style-name="dp1" draw:master-page-name="Blank">
        <draw:custom-shape draw:name="TextBox 1" draw:style-name="gr188" draw:text-style-name="P2" draw:layer="layout" svg:width="31.241cm" svg:height="1.437cm" svg:x="1.27cm" svg:y="0.762cm">
          <text:p text:style-name="P1"><text:span text:style-name="T6">Where to look in th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89" draw:text-style-name="P2" draw:layer="layout" svg:width="31.241cm" svg:height="1.013cm" svg:x="1.27cm" svg:y="2.54cm">
          <text:p text:style-name="P1"><text:span text:style-name="T7">Order matters — start at the descriptor, end at the plan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90" draw:text-style-name="P7" draw:layer="layout" svg:width="30.818cm" svg:height="12.443cm" svg:x="1.524cm" svg:y="3.694cm">
          <text:p text:style-name="P1"><text:span text:style-name="T40">core/src/main/java/com/jetbrains/youtrackdb/internal/core/sql/executor/</text:span></text:p>
          <text:p text:style-name="P1"><text:span text:style-name="T40"/></text:p>
          <text:p text:style-name="P1"><text:span text:style-name="T40">1. RidFilterDescriptor.java</text:span></text:p>
          <text:p text:style-name="P1"><text:span text:style-name="T40"><text:s text:c="5"/></text:span><text:span text:style-name="T40">record IndexLookup <text:s text:c="18"/>← the descriptor itself</text:span></text:p>
          <text:p text:style-name="P1"><text:span text:style-name="T40"><text:s text:c="5"/></text:span><text:span text:style-name="T40">IndexLookup.passesSelectivityCheck <text:s text:c="2"/>← gate 1</text:span></text:p>
          <text:p text:style-name="P1"><text:span text:style-name="T40"/></text:p>
          <text:p text:style-name="P1"><text:span text:style-name="T40">2. match/EdgeTraversal.java</text:span></text:p>
          <text:p text:style-name="P1"><text:span text:style-name="T40"><text:s text:c="5"/></text:span><text:span text:style-name="T40">resolveWithCache <text:s text:c="20"/>← cache + gates entry point</text:span></text:p>
          <text:p text:style-name="P1"><text:span text:style-name="T40"><text:s text:c="5"/></text:span><text:span text:style-name="T40">checkIndexLookupAmortization <text:s text:c="8"/>← gate 2, three-way decision</text:span></text:p>
          <text:p text:style-name="P1"><text:span text:style-name="T40"><text:s text:c="5"/></text:span><text:span text:style-name="T40">evaluateIndexLookupAmortization <text:s text:c="5"/>← Composite-rescue variant</text:span></text:p>
          <text:p text:style-name="P1"><text:span text:style-name="T40"><text:s text:c="5"/></text:span><text:span text:style-name="T40">getForecastN / getRootSourceRows <text:s text:c="4"/>← values stamped by planner</text:span></text:p>
          <text:p text:style-name="P1"><text:span text:style-name="T40"/></text:p>
          <text:p text:style-name="P1"><text:span text:style-name="T40">3. match/MatchExecutionPlanner.java</text:span></text:p>
          <text:p text:style-name="P1"><text:span text:style-name="T40"><text:s text:c="5"/></text:span><text:span text:style-name="T40">optimizeScheduleWithIntersections <text:s text:c="3"/>← creates and attaches the descriptor</text:span></text:p>
          <text:p text:style-name="P1"><text:span text:style-name="T40"><text:s text:c="5"/></text:span><text:span text:style-name="T40">stampEdgeForecasts <text:s text:c="18"/>← forecast pass (short-circuited)</text:span></text:p>
          <text:p text:style-name="P1"><text:span text:style-name="T40"><text:s text:c="5"/></text:span><text:span text:style-name="T40">anyEdgeHasIndexLookup <text:s text:c="15"/>← short-circuit predicate</text:span></text:p>
          <text:p text:style-name="P1"><text:span text:style-name="T40"/></text:p>
          <text:p text:style-name="P1"><text:span text:style-name="T40">4. TraversalPreFilterHelper.java</text:span></text:p>
          <text:p text:style-name="P1"><text:span text:style-name="T40"><text:s text:c="5"/></text:span><text:span text:style-name="T40">findIndexForFilter <text:s text:c="18"/>← planner-side index detection</text:span></text:p>
          <text:p text:style-name="P1"><text:span text:style-name="T40"><text:s text:c="5"/></text:span><text:span text:style-name="T40">resolveIndexToRidSet <text:s text:c="16"/>← runtime materialisation</text:span></text:p>
          <text:p text:style-name="P1"><text:span text:style-name="T40"><text:s text:c="5"/></text:span><text:span text:style-name="T40">maxRidSetSize / loadToScanRatio <text:s text:c="5"/>← thresholds and config</text:span></text:p>
          <text:p text:style-name="P1"><text:span text:style-name="T40"/></text:p>
          <text:p text:style-name="P1"><text:span text:style-name="T40">5. match/MatchStep.java</text:span></text:p>
          <text:p text:style-name="P1"><text:span text:style-name="T40"><text:s text:c="5"/></text:span><text:span text:style-name="T40">appendPreFilterStats <text:s text:c="16"/>← PROFILE diagnostic em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7"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If you want to verify the design from the code. Start with RidFilterDescriptor — the descriptor record, gate 1 lives on the IndexLookup variant. Then EdgeTraversal — resolveWithCache is the entry point, checkIndexLookupAmortization is gate 2 with its three-way decision, evaluateIndexLookupAmortization is the Composite-rescue variant. Then MatchExecutionPlanner — optimizeScheduleWithIntersections attaches the descriptor, stampEdgeForecasts runs the forecast pass with the anyEdgeHasIndexLookup short-circuit. TraversalPreFilterHelper holds findIndexForFilter for planner-side detection and resolveIndexToRidSet for runtime materialisation. Plus MatchStep.appendPreFilterStats emits the PROFILE diagnostic strings. Durable ADR lives in docs/adr/index-assisted-traversal/design-final.md. The implementation PR is number 973 on the JetBrains/youtrackdb repo — design details there too.</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draw:page draw:name="page27" draw:style-name="dp1" draw:master-page-name="Blank">
        <draw:custom-shape draw:name="TextBox 1" draw:style-name="gr191" draw:text-style-name="P2" draw:layer="layout" svg:width="31.241cm" svg:height="2.283cm" svg:x="1.27cm" svg:y="7.112cm">
          <text:p text:style-name="P1"><text:span text:style-name="T57">Thanks —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8" presentation:class="page"/>
          <draw:frame draw:name="Notes Placeholder 2" presentation:style-name="pr1" draw:text-style-name="P4" draw:layer="layout" svg:width="15.239cm" svg:height="11.429cm" svg:x="1.905cm" svg:y="12.065cm" presentation:class="notes" presentation:user-transformed="true">
            <draw:text-box>
              <text:p text:style-name="P3"><text:span text:style-name="T4">Questions. IndexLookup is one descriptor in a broader RidSet pre-filter mechanism — the companion deck covers all four descriptor types end to end if you want the wider picture. Happy to dig into the cost arithmetic, the forecast propagation, the regression test cases, or how this lands against Neo4j's NodeHashJoin equivalent.</text:span></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onsolas" svg:font-family="Consola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79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MP12"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hyphenate="false"/>
    </style:style>
    <style:style style:name="MP13"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hyphenate="false"/>
    </style:style>
    <style:style style:name="MP14"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MP21" style:family="paragraph">
      <loext:graphic-properties draw:fill="none"/>
      <style:paragraph-properties fo:text-align="start" style:font-independent-line-spacing="true"/>
      <style:text-properties fo:font-size="28pt"/>
    </style:style>
    <style:style style:name="MP22"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24pt"/>
    </style:style>
    <style:style style:name="MP24"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MP25"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2">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8">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list text:style-name="ML3">
            <text:list-item>
              <text:p text:style-name="MP18"><text:span text:style-name="MT9">Click to edit Master text styles</text:span></text:p>
            </text:list-item>
          </text:list>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26" draw:text-style-name="MP21" draw:layer="backgroundobjects" svg:width="11.217cm" svg:height="12.571cm" svg:x="1.27cm" svg:y="4.445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4"><text:span text:style-name="MT7">Third level</text:span></text:p>
                      <text:list>
                        <text:list-item>
                          <text:p text:style-name="MP20"><text:span text:style-name="MT10">Fourth level</text:span></text:p>
                          <text:list>
                            <text:list-item>
                              <text:p text:style-name="MP20"><text:span text:style-name="MT10">Fifth level</text:span></text:p>
                            </text:list-item>
                          </text:list>
                        </text:list-item>
                      </text:list>
                    </text:list-item>
                  </text:list>
                </text:list-item>
              </text:list>
            </text:list-item>
          </text:list>
        </draw:text-box>
      </draw:frame>
      <draw:frame draw:name="Content Placeholder 3" presentation:style-name="Mpr26" draw:text-style-name="MP21" draw:layer="backgroundobjects" svg:width="11.217cm" svg:height="12.571cm" svg:x="12.912cm" svg:y="4.445cm" presentation:class="outline" presentation:user-transformed="true">
        <draw:text-box>
          <text:list text:style-name="ML4">
            <text:list-item>
              <text:p text:style-name="MP12"><text:span text:style-name="MT5">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Text Placeholder 2" presentation:style-name="Mpr31" draw:text-style-name="MP23" draw:layer="backgroundobjects" svg:width="11.222cm" svg:height="1.776cm" svg:x="1.27cm" svg:y="4.264cm" presentation:class="outline" presentation:user-transformed="true">
        <draw:text-box>
          <text:list text:style-name="ML3">
            <text:list-item>
              <text:p text:style-name="MP22"><text:span text:style-name="MT11">Click to edit Master text styles</text:span></text:p>
            </text:list-item>
          </text:list>
        </draw:text-box>
      </draw:frame>
      <draw:frame draw:name="Content Placeholder 3" presentation:style-name="Mpr32" draw:text-style-name="MP23" draw:layer="backgroundobjects" svg:width="11.222cm" svg:height="10.975cm" svg:x="1.27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Text Placeholder 4" presentation:style-name="Mpr31" draw:text-style-name="MP23" draw:layer="backgroundobjects" svg:width="11.226cm" svg:height="1.776cm" svg:x="12.903cm" svg:y="4.264cm" presentation:class="outline" presentation:user-transformed="true">
        <draw:text-box>
          <text:p text:style-name="MP22"><text:span text:style-name="MT11">Click to edit Master text styles</text:span></text:p>
        </draw:text-box>
      </draw:frame>
      <draw:frame draw:name="Content Placeholder 5" presentation:style-name="Mpr32" draw:text-style-name="MP23" draw:layer="backgroundobjects" svg:width="11.226cm" svg:height="10.975cm" svg:x="12.903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draw:frame presentation:style-name="Blank-title" draw:layer="backgroundobjects" svg:width="30.478cm" svg:height="3.18cm" svg:x="1.693cm" svg:y="0.76cm" presentation:class="title" presentation:placeholder="true">
        <draw:text-box/>
      </draw:frame>
      <draw:frame presentation:style-name="Blank-outline1" draw:layer="backgroundobjects" svg:width="30.478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16"><text:span text:style-name="MT13">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26" draw:layer="backgroundobjects" svg:width="8.355cm" svg:height="13.03cm" svg:x="1.27cm" svg:y="3.986cm" presentation:class="outline" presentation:user-transformed="true">
        <draw:text-box>
          <text:p text:style-name="MP25"><text:span text:style-name="MT14">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16"><text:span text:style-name="MT13">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26" draw:layer="backgroundobjects" svg:width="15.239cm" svg:height="2.235cm" svg:x="4.979cm" svg:y="14.909cm" presentation:class="outline" presentation:user-transformed="true">
        <draw:text-box>
          <text:p text:style-name="MP25"><text:span text:style-name="MT14">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escription>generated using python-pptx</dc:description>
    <meta:editing-cycles>6</meta:editing-cycles>
    <meta:creation-date>2013-01-27T09:14:16</meta:creation-date>
    <dc:date>2026-05-26T13:11:48.822408683</dc:date>
    <meta:editing-duration>PT20M38S</meta:editing-duration>
    <meta:generator>LibreOffice/24.2.7.2$Linux_X86_64 LibreOffice_project/420$Build-2</meta:generator>
    <meta:document-statistic meta:object-count="392"/>
    <meta:user-defined meta:name="AppVersion">14.0000</meta:user-defined>
    <meta:user-defined meta:name="PresentationFormat">On-screen Show (4:3)</meta:user-defined>
  </office:meta>
</office:document-meta>
</file>